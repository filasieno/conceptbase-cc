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0000cc" draw:marker-start-width="0.813cm" draw:marker-end-width="0.813cm" draw:fill-color="#ffffff" draw:textarea-horizontal-align="justify" draw:textarea-vertical-align="middle" draw:auto-grow-height="false" fo:min-height="1.323cm" fo:min-width="2.132cm" fo:padding-top="0.226cm" fo:padding-bottom="0.226cm" fo:padding-left="0.351cm" fo:padding-right="0.351cm"/>
    </style:style>
    <style:style style:name="gr2" style:family="graphic" style:parent-style-name="standard">
      <style:graphic-properties draw:stroke="none" svg:stroke-width="0.051cm" draw:marker-start-width="0.355cm" draw:marker-end-width="0.355cm" draw:fill="solid" draw:fill-color="#ff3300" draw:textarea-horizontal-align="justify" draw:textarea-vertical-align="middle" draw:auto-grow-height="false" fo:min-height="0.16cm" fo:min-width="0cm" fo:padding-top="0.15cm" fo:padding-bottom="0.15cm" fo:padding-left="0.275cm" fo:padding-right="0.275cm" draw:shadow="hidden" draw:shadow-offset-x="0.051cm" draw:shadow-offset-y="0.051cm"/>
    </style:style>
    <style:style style:name="gr3" style:family="graphic" style:parent-style-name="standard">
      <style:graphic-properties draw:stroke="none" svg:stroke-width="0.051cm" draw:marker-start-width="0.355cm" draw:marker-end-width="0.355cm" draw:fill="solid" draw:fill-color="#ff3300" draw:textarea-horizontal-align="justify" draw:textarea-vertical-align="middle" draw:auto-grow-height="false" fo:min-height="0.161cm" fo:min-width="0cm" fo:padding-top="0.15cm" fo:padding-bottom="0.15cm" fo:padding-left="0.275cm" fo:padding-right="0.275cm" draw:shadow="hidden" draw:shadow-offset-x="0.051cm" draw:shadow-offset-y="0.05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3300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833cm" svg:height="2.839cm" svg:x="1.904cm" svg:y="1.0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" draw:text-style-name="P2" draw:layer="layout" svg:width="0.733cm" svg:height="0.65cm" svg:x="2.118cm" svg:y="1.9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733cm" svg:height="0.65cm" svg:x="2.96cm" svg:y="1.9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733cm" svg:height="0.65cm" svg:x="3.797cm" svg:y="1.9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0.733cm" svg:height="0.651cm" svg:x="2.119cm" svg:y="2.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733cm" svg:height="0.651cm" svg:x="2.961cm" svg:y="2.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733cm" svg:height="0.651cm" svg:x="3.798cm" svg:y="2.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06cm" fo:margin-bottom="0.66cm" fo:margin-left="0.406cm" fo:margin-right="0.406cm" fo:page-width="6.35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8T12:36:16.340473720</meta:creation-date>
    <dc:date>2017-06-01T11:10:30.571233855</dc:date>
    <meta:editing-duration>PT19M13S</meta:editing-duration>
    <meta:editing-cycles>10</meta:editing-cycles>
    <meta:generator>LibreOffice/4.4.7.2$Linux_X86_64 LibreOffice_project/40m0$Build-2</meta:generator>
    <meta:document-statistic meta:object-count="10"/>
  </office:meta>
</office:document-meta>
</file>