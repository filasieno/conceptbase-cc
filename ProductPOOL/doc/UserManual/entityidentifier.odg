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808080" draw:marker-start-width="0.314cm" draw:fill="none" draw:fill-color="#00b8ff" draw:textarea-horizontal-align="center" draw:textarea-vertical-align="middle" fo:min-height="0.963cm" fo:padding-top="0.038cm" fo:padding-bottom="0.038cm" fo:padding-left="0.038cm" fo:padding-right="0.038cm" draw:shadow="hidden" draw:shadow-color="#808080"/>
    </style:style>
    <style:style style:name="gr2" style:family="graphic" style:parent-style-name="standard">
      <style:graphic-properties draw:stroke="none" svg:stroke-width="0.076cm" svg:stroke-color="#808080" draw:marker-start-width="0.314cm" draw:fill="none" draw:textarea-horizontal-align="left" draw:textarea-vertical-align="top" draw:auto-grow-height="true" draw:auto-grow-width="true" fo:min-height="0.703cm" fo:min-width="0cm" fo:padding-top="0.13cm" fo:padding-bottom="0.13cm" fo:padding-left="0.25cm" fo:padding-right="0.25cm"/>
    </style:style>
    <style:style style:name="gr3" style:family="graphic" style:parent-style-name="standard">
      <style:graphic-properties draw:stroke="solid" svg:stroke-width="0.076cm" svg:stroke-color="#808080" draw:marker-start-width="0.314cm" draw:fill="none" draw:fill-color="#00b8ff" draw:textarea-horizontal-align="center" draw:textarea-vertical-align="middle" fo:min-height="0.962cm" fo:padding-top="0.038cm" fo:padding-bottom="0.038cm" fo:padding-left="0.038cm" fo:padding-right="0.038cm" draw:shadow="hidden" draw:shadow-color="#808080"/>
    </style:style>
    <style:style style:name="gr4" style:family="graphic" style:parent-style-name="standard">
      <style:graphic-properties draw:stroke="none" svg:stroke-width="0.076cm" svg:stroke-color="#808080" draw:marker-start-width="0.314cm" draw:fill="none" draw:textarea-horizontal-align="left" draw:textarea-vertical-align="top" draw:auto-grow-height="true" draw:auto-grow-width="true" fo:min-height="0.702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solid" svg:stroke-width="0.076cm" svg:stroke-color="#000000" draw:marker-start-width="0.314cm" draw:fill="none" draw:fill-color="#00b8ff" draw:textarea-horizontal-align="center" draw:textarea-vertical-align="middle" fo:min-height="0.962cm" fo:padding-top="0.038cm" fo:padding-bottom="0.038cm" fo:padding-left="0.038cm" fo:padding-right="0.038cm" draw:shadow="hidden" draw:shadow-color="#808080"/>
    </style:style>
    <style:style style:name="gr6" style:family="graphic" style:parent-style-name="standard">
      <style:graphic-properties draw:stroke="none" svg:stroke-width="0.076cm" draw:marker-start-width="0.314cm" draw:fill="none" draw:textarea-horizontal-align="left" draw:textarea-vertical-align="top" draw:auto-grow-height="true" draw:auto-grow-width="true" fo:min-height="0.702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dash" draw:stroke-dash="Dashed_20__28_var_29__20_3" svg:stroke-width="0.076cm" svg:stroke-color="#008000" draw:marker-start-width="0.314cm" draw:marker-end="msArrowEnd_20_5" draw:marker-end-width="0.21cm" draw:marker-end-center="false" draw:fill="none" draw:fill-color="#ffffff" draw:textarea-horizontal-align="center" draw:textarea-vertical-align="middle" fo:padding-top="0.038cm" fo:padding-bottom="0.038cm" fo:padding-left="0.038cm" fo:padding-right="0.038cm" draw:shadow="hidden" draw:shadow-color="#808080"/>
    </style:style>
    <style:style style:name="gr8" style:family="graphic" style:parent-style-name="standard">
      <style:graphic-properties draw:stroke="solid" svg:stroke-width="0.076cm" svg:stroke-color="#000000" draw:marker-start-width="0.314cm" draw:fill="none" draw:fill-color="#00b8ff" draw:textarea-horizontal-align="center" draw:textarea-vertical-align="middle" fo:min-height="0.963cm" fo:padding-top="0.038cm" fo:padding-bottom="0.038cm" fo:padding-left="0.038cm" fo:padding-right="0.038cm" draw:shadow="hidden" draw:shadow-color="#808080"/>
    </style:style>
    <style:style style:name="gr9" style:family="graphic" style:parent-style-name="standard">
      <style:graphic-properties draw:stroke="none" svg:stroke-width="0.076cm" draw:marker-start-width="0.314cm" draw:fill="none" draw:textarea-horizontal-align="left" draw:textarea-vertical-align="top" draw:auto-grow-height="true" draw:auto-grow-width="true" fo:min-height="0.703cm" fo:min-width="0cm" fo:padding-top="0.13cm" fo:padding-bottom="0.13cm" fo:padding-left="0.25cm" fo:padding-right="0.25cm"/>
    </style:style>
    <style:style style:name="gr10" style:family="graphic" style:parent-style-name="objectwithoutfill">
      <style:graphic-properties svg:stroke-width="0.051cm" svg:stroke-color="#808080" draw:marker-start-width="0.276cm" draw:marker-end="Arrow" draw:marker-end-width="0.376cm" draw:fill="none" draw:textarea-vertical-align="bottom" fo:padding-top="0.102cm" fo:padding-bottom="0.356cm" fo:padding-left="0.275cm" fo:padding-right="0.275cm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draw:textarea-vertical-align="bottom" fo:padding-top="0.102cm" fo:padding-bottom="0.356cm" fo:padding-left="0.275cm" fo:padding-right="0.275cm"/>
    </style:style>
    <style:style style:name="P1" style:family="paragraph">
      <loext:graphic-properties draw:fill="none" draw:fill-color="#00b8ff"/>
      <style:paragraph-properties fo:text-align="center"/>
      <style:text-properties fo:font-size="24pt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="none"/>
      <style:paragraph-properties fo:margin-left="0cm" fo:margin-right="0cm" fo:text-align="center" fo:text-indent="0cm" style:writing-mode="lr-tb"/>
      <style:text-properties style:font-name="Arial" fo:font-size="16pt" style:font-size-asian="16pt" style:font-size-complex="16pt"/>
    </style:style>
    <style:style style:name="P4" style:family="paragraph">
      <loext:graphic-properties draw:fill="none"/>
      <style:paragraph-properties fo:margin-left="0cm" fo:margin-right="0cm" fo:text-align="center" fo:text-indent="0cm" style:writing-mode="lr-tb"/>
      <style:text-properties fo:color="#808080" style:font-name="Arial" fo:font-size="16pt" style:font-size-asian="16pt" style:font-size-complex="16pt"/>
    </style:style>
    <style:style style:name="P5" style:family="paragraph">
      <loext:graphic-properties draw:fill="none" draw:fill-color="#ffffff"/>
      <style:paragraph-properties fo:text-align="center"/>
      <style:text-properties fo:font-size="2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fo:color="#808080" style:font-name="Arial"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296cm" svg:height="0.962cm" svg:x="2.559cm" svg:y="3.332cm">
            <text:p/>
          </draw:rect>
          <draw:rect draw:style-name="gr2" draw:text-style-name="P3" xml:id="id1" draw:id="id1" draw:layer="layout" svg:width="3.296cm" svg:height="0.962cm" svg:x="2.559cm" svg:y="3.332cm">
            <text:p text:style-name="P2"><text:span text:style-name="T1">EntityType</text:span></text:p>
          </draw:rect>
          <draw:g xml:id="id7" draw:id="id7">
            <draw:rect draw:style-name="gr3" draw:text-style-name="P1" draw:layer="layout" svg:width="2.777cm" svg:height="0.961cm" svg:x="2.369cm" svg:y="6.084cm">
              <text:p/>
            </draw:rect>
            <draw:rect draw:style-name="gr4" draw:text-style-name="P4" draw:layer="layout" svg:width="2.777cm" svg:height="0.961cm" svg:x="2.369cm" svg:y="6.084cm">
              <text:p text:style-name="P2"><text:span text:style-name="T2">Manager</text:span></text:p>
            </draw:rect>
          </draw:g>
          <draw:g xml:id="id5" draw:id="id5">
            <draw:rect draw:style-name="gr5" draw:text-style-name="P1" draw:layer="layout" svg:width="1.775cm" svg:height="0.961cm" svg:x="2.925cm" svg:y="8.836cm">
              <text:p/>
            </draw:rect>
            <draw:rect draw:style-name="gr6" draw:text-style-name="P3" draw:layer="layout" svg:width="1.775cm" svg:height="0.961cm" svg:x="2.925cm" svg:y="8.836cm">
              <text:p text:style-name="P2"><text:span text:style-name="T1">mary</text:span></text:p>
            </draw:rect>
          </draw:g>
          <draw:line draw:style-name="gr7" draw:text-style-name="P5" draw:layer="layout" svg:x1="3.866cm" svg:y1="5.871cm" svg:x2="3.866cm" svg:y2="4.39cm">
            <text:p/>
          </draw:line>
          <draw:line draw:style-name="gr7" draw:text-style-name="P5" draw:layer="layout" svg:x1="3.876cm" svg:y1="8.701cm" svg:x2="3.866cm" svg:y2="7.142cm">
            <text:p/>
          </draw:line>
          <draw:g xml:id="id3" draw:id="id3">
            <draw:rect draw:style-name="gr8" draw:text-style-name="P1" draw:layer="layout" svg:width="1.887cm" svg:height="0.962cm" svg:x="7.845cm" svg:y="4.924cm">
              <text:p/>
            </draw:rect>
            <draw:rect draw:style-name="gr9" draw:text-style-name="P3" draw:layer="layout" svg:width="1.887cm" svg:height="0.962cm" svg:x="7.845cm" svg:y="4.924cm">
              <text:p text:style-name="P2"><text:span text:style-name="T1">Entity</text:span></text:p>
            </draw:rect>
          </draw:g>
          <draw:g xml:id="id2" draw:id="id2">
            <draw:rect draw:style-name="gr1" draw:text-style-name="P1" draw:layer="layout" svg:width="2.511cm" svg:height="0.962cm" svg:x="15.721cm" svg:y="3.33cm">
              <text:p/>
            </draw:rect>
            <draw:rect draw:style-name="gr2" draw:text-style-name="P3" draw:layer="layout" svg:width="2.511cm" svg:height="0.962cm" svg:x="15.721cm" svg:y="3.33cm">
              <text:p text:style-name="P2"><text:span text:style-name="T1">Domain</text:span></text:p>
            </draw:rect>
          </draw:g>
          <draw:g xml:id="id8" draw:id="id8">
            <draw:rect draw:style-name="gr3" draw:text-style-name="P1" draw:layer="layout" svg:width="2.215cm" svg:height="0.853cm" svg:x="15.964cm" svg:y="6.192cm">
              <text:p/>
            </draw:rect>
            <draw:rect draw:style-name="gr4" draw:text-style-name="P4" draw:layer="layout" svg:width="1.294cm" svg:height="0.853cm" svg:x="15.964cm" svg:y="6.192cm">
              <text:p text:style-name="P2"><text:span text:style-name="T2">Integer</text:span></text:p>
            </draw:rect>
          </draw:g>
          <draw:g xml:id="id6" draw:id="id6">
            <draw:rect draw:style-name="gr5" draw:text-style-name="P1" draw:layer="layout" svg:width="1.703cm" svg:height="0.943cm" svg:x="16.28cm" svg:y="8.846cm">
              <text:p/>
            </draw:rect>
            <draw:rect draw:style-name="gr6" draw:text-style-name="P3" draw:layer="layout" svg:width="1.703cm" svg:height="0.943cm" svg:x="16.28cm" svg:y="8.846cm">
              <text:p text:style-name="P2"><text:span text:style-name="T1">1234</text:span></text:p>
            </draw:rect>
          </draw:g>
          <draw:line draw:style-name="gr7" draw:text-style-name="P5" draw:layer="layout" svg:x1="16.627cm" svg:y1="8.515cm" svg:x2="16.643cm" svg:y2="7.175cm">
            <text:p/>
          </draw:line>
          <draw:g xml:id="id4" draw:id="id4">
            <draw:rect draw:style-name="gr8" draw:text-style-name="P1" draw:layer="layout" svg:width="1.887cm" svg:height="0.962cm" svg:x="13.939cm" svg:y="4.96cm">
              <text:p/>
            </draw:rect>
            <draw:rect draw:style-name="gr9" draw:text-style-name="P3" draw:layer="layout" svg:width="1.887cm" svg:height="0.962cm" svg:x="13.939cm" svg:y="4.96cm">
              <text:p text:style-name="P2"><text:span text:style-name="T1">Value</text:span></text:p>
            </draw:rect>
          </draw:g>
          <draw:line draw:style-name="gr7" draw:text-style-name="P5" draw:layer="layout" svg:x1="16.611cm" svg:y1="6.163cm" svg:x2="16.648cm" svg:y2="4.341cm">
            <text:p/>
          </draw:line>
          <draw:connector draw:style-name="gr10" draw:text-style-name="P7" draw:layer="layout" draw:type="lines" svg:x1="5.855cm" svg:y1="3.813cm" svg:x2="15.721cm" svg:y2="3.811cm" draw:start-shape="id1" draw:start-glue-point="1" draw:end-shape="id2" draw:end-glue-point="3" svg:d="M5855 3813h500l8828-2h538" svg:viewBox="0 0 9867 3">
            <text:p text:style-name="P6"><text:span text:style-name="T3">key</text:span></text:p>
          </draw:connector>
          <draw:connector draw:style-name="gr11" draw:text-style-name="P7" draw:layer="layout" draw:type="lines" svg:x1="9.732cm" svg:y1="5.405cm" svg:x2="13.939cm" svg:y2="5.441cm" draw:start-shape="id3" draw:start-glue-point="1" draw:end-shape="id4" draw:end-glue-point="3" svg:d="M9732 5405h538l3131 36h538" svg:viewBox="0 0 4208 37">
            <text:p text:style-name="P6"><text:span text:style-name="T3">identifier</text:span></text:p>
          </draw:connector>
          <draw:connector draw:style-name="gr11" draw:text-style-name="P7" draw:layer="layout" draw:type="lines" svg:x1="4.7cm" svg:y1="9.316cm" svg:x2="16.28cm" svg:y2="9.317cm" draw:start-shape="id5" draw:start-glue-point="1" draw:end-shape="id6" draw:end-glue-point="3" svg:d="M4700 9316h538l10504 1h538" svg:viewBox="0 0 11581 2">
            <text:p text:style-name="P6"><text:span text:style-name="T3">m1</text:span></text:p>
          </draw:connector>
          <draw:connector draw:style-name="gr10" draw:text-style-name="P7" draw:layer="layout" draw:type="lines" svg:x1="5.146cm" svg:y1="6.564cm" svg:x2="15.964cm" svg:y2="6.618cm" draw:start-shape="id7" draw:start-glue-point="1" draw:end-shape="id8" draw:end-glue-point="3" svg:d="M5146 6564h538l9742 54h538" svg:viewBox="0 0 10819 55">
            <text:p text:style-name="P6"><text:span text:style-name="T3">mno</text:span></text:p>
          </draw:connector>
          <draw:line draw:style-name="gr7" draw:text-style-name="P5" draw:layer="layout" svg:x1="7.454cm" svg:y1="9.322cm" svg:x2="7.432cm" svg:y2="6.685cm">
            <text:p/>
          </draw:line>
          <draw:line draw:style-name="gr7" draw:text-style-name="P5" draw:layer="layout" svg:x1="7.434cm" svg:y1="6.402cm" svg:x2="7.399cm" svg:y2="3.91cm">
            <text:p/>
          </draw:line>
          <draw:line draw:style-name="gr7" draw:text-style-name="P5" draw:layer="layout" svg:x1="7.726cm" svg:y1="9.233cm" svg:x2="10.274cm" svg:y2="5.44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3" draw:display-name="Dashed (var) 3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5:27:55.007528325</meta:creation-date>
    <dc:date>2016-02-16T15:28:43.004288989</dc:date>
    <meta:editing-duration>PT49S</meta:editing-duration>
    <meta:editing-cycles>1</meta:editing-cycles>
    <meta:document-statistic meta:object-count="35"/>
    <meta:generator>LibreOffice/4.4.6.3$Linux_X86_64 LibreOffice_project/40m0$Build-3</meta:generator>
  </office:meta>
</office:document-meta>
</file>