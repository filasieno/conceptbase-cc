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76cm" draw:fill-color="#ffffff" draw:textarea-horizontal-align="justify" draw:textarea-vertical-align="middle" draw:auto-grow-height="false" fo:min-height="9.082cm" fo:min-width="12.295cm" fo:padding-top="0.163cm" fo:padding-bottom="0.163cm" fo:padding-left="0.288cm" fo:padding-right="0.288cm"/>
    </style:style>
    <style:style style:name="gr2" style:family="graphic" style:parent-style-name="standard">
      <style:graphic-properties draw:stroke="solid" svg:stroke-width="0.051cm" svg:stroke-color="#000000" draw:marker-start-width="0.344cm" draw:marker-end-width="0.344cm" draw:fill="none" draw:fill-color="#ffffff" draw:textarea-horizontal-align="left" draw:auto-grow-height="true" draw:auto-grow-width="true" fo:min-height="0.712cm" fo:min-width="2.119cm" fo:padding-top="0.151cm" fo:padding-bottom="0.151cm" fo:padding-left="0.276cm" fo:padding-right="0.276cm"/>
    </style:style>
    <style:style style:name="gr3" style:family="graphic" style:parent-style-name="standard">
      <style:graphic-properties draw:stroke="solid" svg:stroke-width="0.051cm" svg:stroke-color="#000000" draw:marker-start-width="0.344cm" draw:marker-end-width="0.344cm" draw:fill="none" draw:fill-color="#ffffff" draw:textarea-horizontal-align="left" draw:auto-grow-height="true" draw:auto-grow-width="false" fo:min-height="0.712cm" fo:min-width="0cm" fo:padding-top="0.151cm" fo:padding-bottom="0.151cm" fo:padding-left="0.276cm" fo:padding-right="0.276cm"/>
    </style:style>
    <style:style style:name="gr4" style:family="graphic" style:parent-style-name="standard">
      <style:graphic-properties draw:stroke="solid" svg:stroke-width="0.051cm" svg:stroke-color="#000000" draw:marker-start-width="0.344cm" draw:marker-end-width="0.344cm" draw:fill="none" draw:fill-color="#ffffff" draw:textarea-horizontal-align="left" draw:auto-grow-height="true" draw:auto-grow-width="true" fo:min-height="0.712cm" fo:min-width="1.941cm" fo:padding-top="0.151cm" fo:padding-bottom="0.151cm" fo:padding-left="0.276cm" fo:padding-right="0.276cm"/>
    </style:style>
    <style:style style:name="gr5" style:family="graphic" style:parent-style-name="standard">
      <style:graphic-properties draw:stroke="solid" svg:stroke-width="0.051cm" svg:stroke-color="#000000" draw:marker-start-width="0.344cm" draw:marker-end-width="0.344cm" draw:fill="none" draw:fill-color="#ffffff" draw:textarea-horizontal-align="left" draw:auto-grow-height="true" draw:auto-grow-width="true" fo:min-height="0.712cm" fo:min-width="1.471cm" fo:padding-top="0.151cm" fo:padding-bottom="0.151cm" fo:padding-left="0.276cm" fo:padding-right="0.276cm"/>
    </style:style>
    <style:style style:name="gr6" style:family="graphic" style:parent-style-name="standard">
      <style:graphic-properties draw:stroke="solid" svg:stroke-width="0.051cm" svg:stroke-color="#000000" draw:marker-start-width="0.344cm" draw:marker-end-width="0.344cm" draw:fill="none" draw:fill-color="#ffffff" draw:textarea-horizontal-align="left" draw:auto-grow-height="true" draw:auto-grow-width="true" fo:min-height="0.712cm" fo:min-width="1.166cm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76cm" draw:marker-start-width="0.419cm" draw:marker-end-width="0.419cm" draw:fill="none" draw:textarea-vertical-align="middle" fo:padding-top="0.163cm" fo:padding-bottom="0.163cm" fo:padding-left="0.288cm" fo:padding-right="0.288cm"/>
    </style:style>
    <style:style style:name="gr8" style:family="graphic" style:parent-style-name="objectwithoutfill">
      <style:graphic-properties svg:stroke-width="0.076cm" draw:fill="none" draw:textarea-vertical-align="middle" fo:padding-top="0.163cm" fo:padding-bottom="0.163cm" fo:padding-left="0.288cm" fo:padding-right="0.288cm"/>
    </style:style>
    <style:style style:name="gr9" style:family="graphic" style:parent-style-name="standard">
      <style:graphic-properties draw:stroke="none" svg:stroke-width="0.076cm" svg:stroke-color="#000000" draw:fill="none" draw:fill-color="#ffffff" draw:textarea-horizontal-align="left" draw:auto-grow-height="true" draw:auto-grow-width="true" fo:min-height="0.479cm" fo:min-width="2.881cm" fo:padding-top="0.163cm" fo:padding-bottom="0.163cm" fo:padding-left="0.288cm" fo:padding-right="0.288cm"/>
    </style:style>
    <style:style style:name="gr10" style:family="graphic" style:parent-style-name="standard">
      <style:graphic-properties draw:stroke="none" svg:stroke-width="0.076cm" svg:stroke-color="#000000" draw:fill="none" draw:fill-color="#ffffff" draw:textarea-horizontal-align="left" draw:auto-grow-height="true" draw:auto-grow-width="false" fo:min-height="0.48cm" fo:min-width="0cm" fo:padding-top="0.163cm" fo:padding-bottom="0.163cm" fo:padding-left="0.288cm" fo:padding-right="0.288cm"/>
    </style:style>
    <style:style style:name="gr11" style:family="graphic" style:parent-style-name="standard">
      <style:graphic-properties draw:stroke="none" svg:stroke-width="0.076cm" svg:stroke-color="#000000" draw:fill="none" draw:fill-color="#ffffff" draw:textarea-horizontal-align="left" draw:auto-grow-height="true" draw:auto-grow-width="false" fo:min-height="0.658cm" fo:min-width="0cm" fo:padding-top="0.163cm" fo:padding-bottom="0.163cm" fo:padding-left="0.288cm" fo:padding-right="0.288cm"/>
    </style:style>
    <style:style style:name="gr12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top" draw:auto-grow-height="false" fo:min-height="1.601cm" fo:min-width="2.657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755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132cm"/>
    </style:style>
    <style:style style:name="gr17" style:family="graphic" style:parent-style-name="standard">
      <style:graphic-properties svg:stroke-color="#000000" draw:fill-color="#666666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top" draw:auto-grow-height="false" fo:min-height="1.601cm" fo:min-width="2.669cm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07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81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64cm"/>
    </style:style>
    <style:style style:name="gr23" style:family="graphic" style:parent-style-name="objectwithoutfill">
      <style:graphic-properties svg:stroke-width="0.102cm" svg:stroke-color="#000099" draw:marker-start-width="0.352cm" draw:marker-end-width="0.352cm" draw:fill="none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top" draw:auto-grow-height="false" fo:min-height="1.464cm" fo:min-width="2.452cm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64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386cm"/>
    </style:style>
    <style:style style:name="gr28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top" draw:auto-grow-height="false" fo:min-height="1.37cm" fo:min-width="2.333cm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56cm"/>
    </style:style>
    <style:style style:name="gr31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top" draw:auto-grow-height="false" fo:min-height="1.206cm" fo:min-width="1.939cm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6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9cm" fo:min-width="0cm"/>
    </style:style>
    <style:style style:name="gr34" style:family="graphic" style:parent-style-name="objectwithoutfill">
      <style:graphic-properties draw:stroke="dash" draw:stroke-dash="Fine_20_Dashed" svg:stroke-width="0.051cm" draw:marker-start-width="0.355cm" draw:marker-end="Line_20_Arrow" draw:marker-end-width="0.356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-color="#666666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2.871cm" svg:height="9.408cm" svg:x="3.397cm" svg:y="3.5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2" xml:id="id1" draw:id="id1" draw:layer="layout" svg:width="2.671cm" svg:height="1.014cm" svg:x="6.972cm" svg:y="3.754cm">
            <draw:text-box>
              <text:p>System</text:p>
            </draw:text-box>
          </draw:frame>
          <draw:frame draw:style-name="gr3" draw:text-style-name="P2" xml:id="id2" draw:id="id2" draw:layer="layout" svg:width="2.594cm" svg:height="1.014cm" svg:x="7.008cm" svg:y="6.167cm">
            <draw:text-box>
              <text:p>oHome</text:p>
            </draw:text-box>
          </draw:frame>
          <draw:frame draw:style-name="gr4" draw:text-style-name="P2" xml:id="id3" draw:id="id3" draw:layer="layout" svg:width="2.493cm" svg:height="1.014cm" svg:x="3.577cm" svg:y="9.541cm">
            <draw:text-box>
              <text:p>Master</text:p>
            </draw:text-box>
          </draw:frame>
          <draw:frame draw:style-name="gr5" draw:text-style-name="P2" xml:id="id4" draw:id="id4" draw:layer="layout" svg:width="2.023cm" svg:height="1.014cm" svg:x="11.014cm" svg:y="9.541cm">
            <draw:text-box>
              <text:p>Work</text:p>
            </draw:text-box>
          </draw:frame>
          <draw:frame draw:style-name="gr6" draw:text-style-name="P2" xml:id="id5" draw:id="id5" draw:layer="layout" svg:width="1.718cm" svg:height="1.014cm" svg:x="11.158cm" svg:y="11.837cm">
            <draw:text-box>
              <text:p>Test</text:p>
            </draw:text-box>
          </draw:frame>
          <draw:connector draw:style-name="gr7" draw:text-style-name="P3" draw:layer="layout" draw:type="lines" svg:x1="8.307cm" svg:y1="4.768cm" svg:x2="8.305cm" svg:y2="6.167cm" draw:start-shape="id1" draw:start-glue-point="2" draw:end-shape="id2" draw:end-glue-point="0" svg:d="M8307 4768v526l-2 347v526" svg:viewBox="0 0 3 1400">
            <text:p/>
          </draw:connector>
          <draw:connector draw:style-name="gr8" draw:text-style-name="P3" draw:layer="layout" draw:type="line" svg:x1="8.305cm" svg:y1="7.181cm" svg:x2="4.823cm" svg:y2="9.541cm" draw:start-shape="id2" draw:start-glue-point="2" draw:end-shape="id3" draw:end-glue-point="0" svg:d="M8305 7181l-3482 2360" svg:viewBox="0 0 3483 2361">
            <text:p/>
          </draw:connector>
          <draw:connector draw:style-name="gr8" draw:text-style-name="P3" draw:layer="layout" draw:type="line" svg:x1="8.305cm" svg:y1="7.181cm" svg:x2="12.025cm" svg:y2="9.541cm" draw:start-shape="id2" draw:start-glue-point="2" draw:end-shape="id4" draw:end-glue-point="0" svg:d="M8305 7181l3720 2360" svg:viewBox="0 0 3721 2361">
            <text:p/>
          </draw:connector>
          <draw:connector draw:style-name="gr8" draw:text-style-name="P3" draw:layer="layout" draw:type="line" svg:x1="12.025cm" svg:y1="10.555cm" svg:x2="12.017cm" svg:y2="11.837cm" draw:start-shape="id4" draw:start-glue-point="2" draw:end-shape="id5" draw:end-glue-point="0" svg:d="M12025 10555l-8 1282" svg:viewBox="0 0 9 1283">
            <text:p/>
          </draw:connector>
          <draw:frame draw:style-name="gr9" draw:text-style-name="P4" draw:layer="layout" svg:width="3.457cm" svg:height="0.805cm" svg:x="10.082cm" svg:y="3.859cm">
            <draw:text-box>
              <text:p><text:span text:style-name="T1">{Proposition,...}</text:span></text:p>
            </draw:text-box>
          </draw:frame>
          <draw:frame draw:style-name="gr10" draw:text-style-name="P4" draw:layer="layout" svg:width="3.313cm" svg:height="0.806cm" svg:x="10.227cm" svg:y="6.271cm">
            <draw:text-box>
              <text:p><text:span text:style-name="T1">{EntityType,...}</text:span></text:p>
            </draw:text-box>
          </draw:frame>
          <draw:frame draw:style-name="gr11" draw:text-style-name="P4" draw:layer="layout" svg:width="3.313cm" svg:height="0.984cm" svg:x="6.296cm" svg:y="9.556cm">
            <draw:text-box>
              <text:p><text:span text:style-name="T1">{Employee,...}</text:span></text:p>
            </draw:text-box>
          </draw:frame>
          <draw:frame draw:style-name="gr10" draw:text-style-name="P4" draw:layer="layout" svg:width="3.313cm" svg:height="0.806cm" svg:x="13.162cm" svg:y="9.645cm">
            <draw:text-box>
              <text:p><text:span text:style-name="T1">{Manager,...}</text:span></text:p>
            </draw:text-box>
          </draw:frame>
          <draw:frame draw:style-name="gr10" draw:text-style-name="P4" draw:layer="layout" svg:width="3.313cm" svg:height="0.806cm" svg:x="13.199cm" svg:y="11.941cm">
            <draw:text-box>
              <text:p><text:span text:style-name="T1">{bill,...}</text:span></text:p>
            </draw:text-box>
          </draw:frame>
        </draw:g>
        <draw:g>
          <draw:custom-shape draw:style-name="gr12" draw:text-style-name="P1" draw:layer="layout" svg:width="4.533cm" svg:height="2.687cm" svg:x="7.144cm" svg:y="13.7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5" draw:layer="layout" svg:width="2.255cm" svg:height="0.649cm" svg:x="7.182cm" svg:y="14.834cm">
            <draw:text-box>
              <text:p><text:span text:style-name="T2">Proposition</text:span></text:p>
            </draw:text-box>
          </draw:frame>
          <draw:custom-shape draw:style-name="gr14" draw:text-style-name="P6" draw:layer="layout" svg:width="0.343cm" svg:height="0.305cm" svg:x="7.93cm" svg:y="15.3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2" draw:layer="layout" svg:width="2.619cm" svg:height="0.962cm" svg:x="8.308cm" svg:y="13.705cm">
            <draw:text-box>
              <text:p>System</text:p>
            </draw:text-box>
          </draw:frame>
          <draw:frame draw:style-name="gr16" draw:text-style-name="P5" draw:layer="layout" svg:width="1.632cm" svg:height="0.649cm" svg:x="8.788cm" svg:y="15.522cm">
            <draw:text-box>
              <text:p><text:span text:style-name="T2">oHome</text:span></text:p>
            </draw:text-box>
          </draw:frame>
          <draw:custom-shape draw:style-name="gr14" draw:text-style-name="P6" xml:id="id6" draw:id="id6" draw:layer="layout" svg:width="0.343cm" svg:height="0.305cm" svg:x="9.394cm" svg:y="16.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7" draw:layer="layout" svg:width="0.343cm" svg:height="0.305cm" svg:x="10.665cm" svg:y="15.029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7" draw:layer="layout" svg:width="0.343cm" svg:height="0.305cm" svg:x="10.223cm" svg:y="14.6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" draw:layer="layout" svg:width="4.551cm" svg:height="2.687cm" svg:x="7.329cm" svg:y="17.5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" draw:text-style-name="P5" draw:layer="layout" svg:width="1.577cm" svg:height="0.649cm" svg:x="8.171cm" svg:y="19.266cm">
            <draw:text-box>
              <text:p><text:span text:style-name="T2">Master</text:span></text:p>
            </draw:text-box>
          </draw:frame>
          <draw:custom-shape draw:style-name="gr14" draw:text-style-name="P6" xml:id="id8" draw:id="id8" draw:layer="layout" svg:width="0.343cm" svg:height="0.305cm" svg:x="8.795cm" svg:y="19.8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2" xml:id="id7" draw:id="id7" draw:layer="layout" svg:width="2.542cm" svg:height="0.962cm" svg:x="8.308cm" svg:y="17.529cm">
            <draw:text-box>
              <text:p>oHome</text:p>
            </draw:text-box>
          </draw:frame>
          <draw:frame draw:style-name="gr21" draw:text-style-name="P5" draw:layer="layout" svg:width="1.315cm" svg:height="0.649cm" svg:x="9.546cm" svg:y="19.266cm">
            <draw:text-box>
              <text:p><text:span text:style-name="T2">Work</text:span></text:p>
            </draw:text-box>
          </draw:frame>
          <draw:custom-shape draw:style-name="gr14" draw:text-style-name="P6" xml:id="id10" draw:id="id10" draw:layer="layout" svg:width="0.343cm" svg:height="0.305cm" svg:x="10.152cm" svg:y="19.8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7" draw:layer="layout" svg:width="0.343cm" svg:height="0.305cm" svg:x="11.141cm" svg:y="18.6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0.343cm" svg:height="0.305cm" svg:x="8.441cm" svg:y="18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5" draw:layer="layout" svg:width="2.14cm" svg:height="0.649cm" svg:x="7.449cm" svg:y="18.358cm">
            <draw:text-box>
              <text:p><text:span text:style-name="T2">EntityType</text:span></text:p>
            </draw:text-box>
          </draw:frame>
          <draw:connector draw:style-name="gr23" draw:text-style-name="P3" draw:layer="layout" draw:type="line" svg:x1="9.566cm" svg:y1="16.375cm" svg:x2="9.579cm" svg:y2="17.529cm" draw:start-shape="id6" draw:start-glue-point="8" draw:end-shape="id7" draw:end-glue-point="0" svg:d="M9566 16375l13 1154" svg:viewBox="0 0 14 1155">
            <text:p/>
          </draw:connector>
          <draw:connector draw:style-name="gr23" draw:text-style-name="P3" draw:layer="layout" draw:type="line" svg:x1="8.845cm" svg:y1="20.084cm" svg:x2="6.326cm" svg:y2="21.917cm" draw:start-shape="id8" draw:start-glue-point="7" draw:end-shape="id9" draw:end-glue-point="0" svg:d="M8845 20084l-2519 1833" svg:viewBox="0 0 2520 1834">
            <text:p/>
          </draw:connector>
          <draw:g>
            <draw:custom-shape draw:style-name="gr24" draw:text-style-name="P1" xml:id="id14" draw:id="id14" draw:layer="layout" svg:width="4.244cm" svg:height="2.494cm" svg:x="11.076cm" svg:y="21.8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5" draw:text-style-name="P2" xml:id="id11" draw:id="id11" draw:layer="layout" svg:width="1.971cm" svg:height="0.962cm" svg:x="12.258cm" svg:y="21.825cm">
              <draw:text-box>
                <text:p>Work</text:p>
              </draw:text-box>
            </draw:frame>
            <draw:frame draw:style-name="gr26" draw:text-style-name="P5" draw:layer="layout" svg:width="1.145cm" svg:height="0.649cm" svg:x="12.685cm" svg:y="23.359cm">
              <draw:text-box>
                <text:p><text:span text:style-name="T2">Test</text:span></text:p>
              </draw:text-box>
            </draw:frame>
            <draw:custom-shape draw:style-name="gr14" draw:text-style-name="P6" xml:id="id12" draw:id="id12" draw:layer="layout" svg:width="0.343cm" svg:height="0.305cm" svg:x="13.097cm" svg:y="23.8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7" draw:layer="layout" svg:width="0.343cm" svg:height="0.305cm" svg:x="13.575cm" svg:y="22.84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6" draw:layer="layout" svg:width="0.343cm" svg:height="0.305cm" svg:x="12.092cm" svg:y="23.0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7" draw:text-style-name="P5" draw:layer="layout" svg:width="1.886cm" svg:height="0.649cm" svg:x="11.47cm" svg:y="22.477cm">
              <draw:text-box>
                <text:p><text:span text:style-name="T2">Manager</text:span></text:p>
              </draw:text-box>
            </draw:frame>
          </draw:g>
          <draw:connector draw:style-name="gr23" draw:text-style-name="P3" draw:layer="layout" draw:type="line" svg:x1="10.445cm" svg:y1="20.084cm" svg:x2="13.243cm" svg:y2="21.825cm" draw:start-shape="id10" draw:start-glue-point="9" draw:end-shape="id11" draw:end-glue-point="0" svg:d="M10445 20084l2798 1741" svg:viewBox="0 0 2799 1742">
            <text:p/>
          </draw:connector>
          <draw:g>
            <draw:custom-shape draw:style-name="gr28" draw:text-style-name="P1" xml:id="id15" draw:id="id15" draw:layer="layout" svg:width="4.075cm" svg:height="2.362cm" svg:x="4.233cm" svg:y="21.87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9" draw:text-style-name="P2" xml:id="id9" draw:id="id9" draw:layer="layout" svg:width="2.441cm" svg:height="0.962cm" svg:x="5.106cm" svg:y="21.917cm">
              <draw:text-box>
                <text:p>Master</text:p>
              </draw:text-box>
            </draw:frame>
            <draw:custom-shape draw:style-name="gr14" draw:text-style-name="P6" draw:layer="layout" svg:width="0.343cm" svg:height="0.305cm" svg:x="6.641cm" svg:y="23.4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0" draw:text-style-name="P5" draw:layer="layout" svg:width="2.06cm" svg:height="0.649cm" svg:x="5.825cm" svg:y="22.931cm">
              <draw:text-box>
                <text:p><text:span text:style-name="T2">Employee</text:span></text:p>
              </draw:text-box>
            </draw:frame>
            <draw:custom-shape draw:style-name="gr17" draw:text-style-name="P7" draw:layer="layout" svg:width="0.343cm" svg:height="0.305cm" svg:x="4.95cm" svg:y="23.07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31" draw:text-style-name="P1" xml:id="id13" draw:id="id13" draw:layer="layout" svg:width="3.519cm" svg:height="2.128cm" svg:x="11.51cm" svg:y="25.4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2" draw:text-style-name="P2" draw:layer="layout" svg:width="1.666cm" svg:height="0.962cm" svg:x="12.576cm" svg:y="25.38cm">
            <draw:text-box>
              <text:p>Test</text:p>
            </draw:text-box>
          </draw:frame>
          <draw:custom-shape draw:style-name="gr17" draw:text-style-name="P7" draw:layer="layout" svg:width="0.343cm" svg:height="0.305cm" svg:x="13.981cm" svg:y="26.6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0.343cm" svg:height="0.305cm" svg:x="12.427cm" svg:y="26.8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3" draw:text-style-name="P5" draw:layer="layout" svg:width="0.925cm" svg:height="0.649cm" svg:x="12.123cm" svg:y="26.362cm">
            <draw:text-box>
              <text:p><text:span text:style-name="T2">bill</text:span></text:p>
            </draw:text-box>
          </draw:frame>
          <draw:connector draw:style-name="gr23" draw:text-style-name="P3" draw:layer="layout" draw:type="line" svg:x1="13.269cm" svg:y1="24.186cm" svg:x2="13.27cm" svg:y2="25.469cm" draw:start-shape="id12" draw:start-glue-point="8" draw:end-shape="id13" draw:end-glue-point="4" svg:d="M13269 24186l1 1283" svg:viewBox="0 0 2 1284">
            <text:p/>
          </draw:connector>
          <draw:connector draw:style-name="gr34" draw:text-style-name="P3" draw:layer="layout" draw:type="line" svg:x1="11.076cm" svg:y1="23.055cm" svg:x2="8.308cm" svg:y2="23.055cm" draw:start-shape="id14" draw:start-glue-point="6" draw:end-shape="id15" draw:end-glue-point="10" svg:d="M11076 23055h-2768" svg:viewBox="0 0 2769 1">
            <text:p/>
          </draw:connector>
          <draw:frame draw:style-name="gr22" draw:text-style-name="P5" draw:layer="layout" svg:width="2.14cm" svg:height="0.649cm" svg:x="9.001cm" svg:y="22.275cm">
            <draw:text-box>
              <text:p><text:span text:style-name="T2">imports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5T15:33:14.531892812</meta:creation-date>
    <dc:date>2015-12-17T15:12:52.420135784</dc:date>
    <meta:editing-duration>PT2H27M33S</meta:editing-duration>
    <meta:editing-cycles>5</meta:editing-cycles>
    <meta:generator>LibreOffice/4.4.6.3$Linux_X86_64 LibreOffice_project/40m0$Build-3</meta:generator>
    <meta:document-statistic meta:object-count="59"/>
  </office:meta>
</office:document-meta>
</file>