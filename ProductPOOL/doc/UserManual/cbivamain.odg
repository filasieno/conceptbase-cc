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24458F9A3911D391D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691cm"/>
      <style:paragraph-properties style:writing-mode="lr-tb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="none" fo:min-height="1.183cm"/>
      <style:paragraph-properties style:writing-mode="lr-tb"/>
    </style:style>
    <style:style style:name="gr5" style:family="graphic" style:parent-style-name="standard">
      <style:graphic-properties draw:stroke="none" draw:fill="none" fo:min-height="0.5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7.51cm" svg:height="15.345cm" svg:x="3.256cm" svg:y="2.132cm">
            <draw:image xlink:href="Pictures/10000001000002B70000024458F9A3911D391DF9.png" xlink:type="simple" xlink:show="embed" xlink:actuate="onLoad" draw:mime-type="image/png">
              <text:p/>
            </draw:image>
          </draw:frame>
          <draw:frame draw:style-name="gr2" draw:text-style-name="P2" draw:layer="layout" svg:width="11.191cm" svg:height="0.645cm" svg:x="2.292cm" svg:y="1.182cm">
            <draw:text-box>
              <text:p><text:span text:style-name="T1">Clear <text:s text:c="2"/>Cut <text:s text:c="2"/>Copy <text:s/>Paste <text:s text:c="2"/>Tell <text:s/>Untell <text:s text:c="2"/>Retell <text:s text:c="2"/>Ask <text:s/>List Module <text:s text:c="2"/>Exit</text:span></text:p>
            </draw:text-box>
          </draw:frame>
          <draw:line draw:style-name="gr3" draw:text-style-name="P3" draw:layer="layout" svg:x1="4.205cm" svg:y1="3.45cm" svg:x2="3.001cm" svg:y2="1.702cm">
            <text:p/>
          </draw:line>
          <draw:line draw:style-name="gr3" draw:text-style-name="P3" draw:layer="layout" svg:x1="4.937cm" svg:y1="3.544cm" svg:x2="3.993cm" svg:y2="1.631cm">
            <text:p/>
          </draw:line>
          <draw:line draw:style-name="gr3" draw:text-style-name="P3" draw:layer="layout" svg:x1="5.788cm" svg:y1="3.521cm" svg:x2="4.89cm" svg:y2="1.678cm">
            <text:p/>
          </draw:line>
          <draw:line draw:style-name="gr3" draw:text-style-name="P3" draw:layer="layout" svg:x1="6.378cm" svg:y1="3.544cm" svg:x2="5.883cm" svg:y2="1.654cm">
            <text:p/>
          </draw:line>
          <draw:line draw:style-name="gr3" draw:text-style-name="P3" draw:layer="layout" svg:x1="7.181cm" svg:y1="3.616cm" svg:x2="6.993cm" svg:y2="1.702cm">
            <text:p/>
          </draw:line>
          <draw:line draw:style-name="gr3" draw:text-style-name="P3" draw:layer="layout" svg:x1="8.457cm" svg:y1="3.591cm" svg:x2="7.891cm" svg:y2="1.678cm">
            <text:p/>
          </draw:line>
          <draw:line draw:style-name="gr3" draw:text-style-name="P3" draw:layer="layout" svg:x1="8.906cm" svg:y1="3.615cm" svg:x2="9.166cm" svg:y2="1.726cm">
            <text:p/>
          </draw:line>
          <draw:line draw:style-name="gr3" draw:text-style-name="P3" draw:layer="layout" svg:x1="9.591cm" svg:y1="3.521cm" svg:x2="10.017cm" svg:y2="1.655cm">
            <text:p/>
          </draw:line>
          <draw:line draw:style-name="gr3" draw:text-style-name="P3" draw:layer="layout" svg:x1="10.702cm" svg:y1="3.568cm" svg:x2="11.245cm" svg:y2="1.725cm">
            <text:p/>
          </draw:line>
          <draw:line draw:style-name="gr3" draw:text-style-name="P3" draw:layer="layout" svg:x1="11.552cm" svg:y1="3.521cm" svg:x2="12.923cm" svg:y2="1.631cm">
            <text:p/>
          </draw:line>
          <draw:frame draw:style-name="gr4" draw:text-style-name="P4" draw:layer="layout" svg:width="1.923cm" svg:height="1.433cm" svg:x="1cm" svg:y="2.065cm">
            <draw:text-box>
              <text:p><text:span text:style-name="T1">Quick</text:span></text:p>
              <text:p><text:span text:style-name="T1">Connect</text:span></text:p>
            </draw:text-box>
          </draw:frame>
          <draw:line draw:style-name="gr3" draw:text-style-name="P3" draw:layer="layout" svg:x1="3.497cm" svg:y1="3.473cm" svg:x2="2.694cm" svg:y2="2.529cm">
            <text:p/>
          </draw:line>
          <draw:frame draw:style-name="gr4" draw:text-style-name="P4" draw:layer="layout" svg:width="1.923cm" svg:height="1.433cm" svg:x="1cm" svg:y="4.24cm">
            <draw:text-box>
              <text:p><text:span text:style-name="T1">User</text:span></text:p>
              <text:p><text:span text:style-name="T1">Queries</text:span></text:p>
            </draw:text-box>
          </draw:frame>
          <draw:line draw:style-name="gr3" draw:text-style-name="P3" draw:layer="layout" svg:x1="3.497cm" svg:y1="4.513cm" svg:x2="2.363cm" svg:y2="4.537cm">
            <text:p/>
          </draw:line>
          <draw:frame draw:style-name="gr4" draw:text-style-name="P4" draw:layer="layout" svg:width="1.93cm" svg:height="1.433cm" svg:x="1cm" svg:y="7.123cm">
            <draw:text-box>
              <text:p><text:span text:style-name="T1">Main Telos</text:span></text:p>
              <text:p><text:span text:style-name="T1">Editor</text:span></text:p>
            </draw:text-box>
          </draw:frame>
          <draw:line draw:style-name="gr3" draw:text-style-name="P3" draw:layer="layout" svg:x1="9.733cm" svg:y1="7.726cm" svg:x2="2.317cm" svg:y2="7.774cm">
            <text:p/>
          </draw:line>
          <draw:frame draw:style-name="gr4" draw:text-style-name="P4" draw:layer="layout" svg:width="1.93cm" svg:height="1.433cm" svg:x="1cm" svg:y="14.187cm">
            <draw:text-box>
              <text:p><text:span text:style-name="T1">History</text:span></text:p>
              <text:p><text:span text:style-name="T1">Window</text:span></text:p>
            </draw:text-box>
          </draw:frame>
          <draw:line draw:style-name="gr3" draw:text-style-name="P3" draw:layer="layout" svg:x1="8.906cm" svg:y1="14.883cm" svg:x2="2.552cm" svg:y2="14.789cm">
            <text:p/>
          </draw:line>
          <draw:frame draw:style-name="gr4" draw:text-style-name="P4" draw:layer="layout" svg:width="1.923cm" svg:height="1.433cm" svg:x="1.071cm" svg:y="11.776cm">
            <draw:text-box>
              <text:p><text:span text:style-name="T1">Visible</text:span></text:p>
              <text:p><text:span text:style-name="T1">Modules</text:span></text:p>
            </draw:text-box>
          </draw:frame>
          <draw:line draw:style-name="gr3" draw:text-style-name="P3" draw:layer="layout" svg:x1="3.497cm" svg:y1="12.286cm" svg:x2="2.363cm" svg:y2="12.31cm">
            <text:p/>
          </draw:line>
          <draw:frame draw:style-name="gr4" draw:text-style-name="P4" draw:layer="layout" svg:width="1.93cm" svg:height="1.433cm" svg:x="1.024cm" svg:y="16.15cm">
            <draw:text-box>
              <text:p><text:span text:style-name="T1">Status</text:span></text:p>
              <text:p><text:span text:style-name="T1">Bar</text:span></text:p>
            </draw:text-box>
          </draw:frame>
          <draw:line draw:style-name="gr3" draw:text-style-name="P3" draw:layer="layout" svg:x1="3.332cm" svg:y1="16.632cm" svg:x2="2.22cm" svg:y2="16.632cm">
            <text:p/>
          </draw:line>
          <draw:frame draw:style-name="gr4" draw:text-style-name="P4" draw:layer="layout" svg:width="2.756cm" svg:height="1.433cm" svg:x="1.448cm" svg:y="17.545cm">
            <draw:text-box>
              <text:p><text:span text:style-name="T1">Current rollback time</text:span></text:p>
            </draw:text-box>
          </draw:frame>
          <draw:line draw:style-name="gr3" draw:text-style-name="P3" draw:layer="layout" svg:x1="3.591cm" svg:y1="17.388cm" svg:x2="2.929cm" svg:y2="17.814cm">
            <text:p/>
          </draw:line>
          <draw:frame draw:style-name="gr5" draw:text-style-name="P4" draw:layer="layout" svg:width="4.244cm" svg:height="0.777cm" svg:x="9.315cm" svg:y="17.948cm">
            <draw:text-box>
              <text:p><text:span text:style-name="T1">Current module</text:span></text:p>
            </draw:text-box>
          </draw:frame>
          <draw:line draw:style-name="gr3" draw:text-style-name="P3" draw:layer="layout" svg:x1="11.08cm" svg:y1="17.388cm" svg:x2="10.323cm" svg:y2="18.00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5-02T23:14:08.687631566</meta:creation-date>
    <dc:date>2026-05-03T13:16:39.326918178</dc:date>
    <dc:creator>Manfred Jeusfeld</dc:creator>
    <meta:editing-duration>PT10M18S</meta:editing-duration>
    <meta:editing-cycles>2</meta:editing-cycles>
    <meta:generator>LibreOffice/7.3.7.2$Linux_X86_64 LibreOffice_project/30$Build-2</meta:generator>
    <meta:document-statistic meta:object-count="29"/>
  </office:meta>
</office:document-meta>
</file>