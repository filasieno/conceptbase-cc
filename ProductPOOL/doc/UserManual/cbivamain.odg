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E000001FC174941A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1.5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0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1.585cm"/>
    </style:style>
    <style:style style:name="gr7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 draw:shadow="visible" draw:shadow-color="#ffffff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14cm"/>
    </style:style>
    <style:style style:name="gr9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 draw:shadow="visible" draw:shadow-offset-x="0.127cm" draw:shadow-offset-y="0.127cm" draw:shadow-color="#ffffff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62cm"/>
    </style:style>
    <style:style style:name="gr11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 draw:shadow="visible" draw:shadow-offset-x="0.102cm" draw:shadow-offset-y="0.102cm" draw:shadow-color="#ffffff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93cm"/>
    </style:style>
    <style:style style:name="gr13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 draw:shadow="visible" draw:shadow-offset-x="0.025cm" draw:shadow-offset-y="0.025cm" draw:shadow-color="#ffffff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613cm"/>
    </style:style>
    <style:style style:name="gr16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 draw:shadow="visible" draw:shadow-offset-x="0.051cm" draw:shadow-offset-y="0.051cm" draw:shadow-color="#ffffff"/>
    </style:style>
    <style:style style:name="gr17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 draw:shadow="visible" draw:shadow-offset-x="-0.051cm" draw:shadow-offset-y="0.051cm" draw:shadow-color="#ffffff"/>
    </style:style>
    <style:style style:name="gr18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 draw:shadow="visible" draw:shadow-offset-x="-0.076cm" draw:shadow-offset-y="0.076cm" draw:shadow-color="#ffffff"/>
    </style:style>
    <style:style style:name="gr19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 draw:shadow="visible" draw:shadow-offset-x="-0.102cm" draw:shadow-offset-y="0.102cm" draw:shadow-color="#ffffff"/>
    </style:style>
    <style:style style:name="gr20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 draw:shadow="visible" draw:shadow-offset-x="-0.203cm" draw:shadow-color="#ffffff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4.421cm" svg:height="14.364cm" svg:x="4.833cm" svg:y="2.416cm">
            <draw:image xlink:href="Pictures/10000201000001FE000001FC174941A0.png" xlink:type="simple" xlink:show="embed" xlink:actuate="onLoad">
              <text:p/>
            </draw:image>
          </draw:frame>
          <draw:line draw:style-name="gr2" draw:text-style-name="P2" draw:layer="layout" svg:x1="4.884cm" svg:y1="16.16cm" svg:x2="3.398cm" svg:y2="16.16cm">
            <text:p/>
          </draw:line>
          <draw:frame draw:style-name="gr3" draw:text-style-name="P3" draw:layer="layout" svg:width="2.487cm" svg:height="0.729cm" svg:x="1cm" svg:y="15.751cm">
            <draw:text-box>
              <text:p><text:span text:style-name="T1">Status Bar</text:span></text:p>
            </draw:text-box>
          </draw:frame>
          <draw:line draw:style-name="gr2" draw:text-style-name="P2" draw:layer="layout" svg:x1="6.655cm" svg:y1="12.659cm" svg:x2="3.495cm" svg:y2="12.242cm">
            <text:p/>
          </draw:line>
          <draw:frame draw:style-name="gr4" draw:text-style-name="P3" draw:layer="layout" svg:width="2.009cm" svg:height="1.207cm" svg:x="1.652cm" svg:y="11.373cm">
            <draw:text-box>
              <text:p><text:span text:style-name="T1">History</text:span></text:p>
              <text:p><text:span text:style-name="T1">Window</text:span></text:p>
            </draw:text-box>
          </draw:frame>
          <draw:line draw:style-name="gr2" draw:text-style-name="P2" draw:layer="layout" svg:x1="6.451cm" svg:y1="8.731cm" svg:x2="3.791cm" svg:y2="8.719cm">
            <text:p/>
          </draw:line>
          <draw:frame draw:style-name="gr5" draw:text-style-name="P3" draw:layer="layout" svg:width="2.517cm" svg:height="1.207cm" svg:x="1.948cm" svg:y="7.85cm">
            <draw:text-box>
              <text:p><text:span text:style-name="T1">Main Telos</text:span></text:p>
              <text:p><text:span text:style-name="T1">Editor</text:span></text:p>
            </draw:text-box>
          </draw:frame>
          <draw:line draw:style-name="gr2" draw:text-style-name="P2" draw:layer="layout" svg:x1="5.495cm" svg:y1="4.009cm" svg:x2="3.611cm" svg:y2="3.251cm">
            <text:p/>
          </draw:line>
          <draw:frame draw:style-name="gr6" draw:text-style-name="P3" draw:layer="layout" svg:width="2.085cm" svg:height="1.207cm" svg:x="1.914cm" svg:y="2.858cm">
            <draw:text-box>
              <text:p><text:span text:style-name="T1">Quick</text:span></text:p>
              <text:p><text:span text:style-name="T1">Connect</text:span></text:p>
            </draw:text-box>
          </draw:frame>
          <draw:line draw:style-name="gr7" draw:text-style-name="P2" draw:layer="layout" svg:x1="6.512cm" svg:y1="4.009cm" svg:x2="4.008cm" svg:y2="1.915cm">
            <text:p/>
          </draw:line>
          <draw:frame draw:style-name="gr8" draw:text-style-name="P3" draw:layer="layout" svg:width="1.514cm" svg:height="0.729cm" svg:x="3.055cm" svg:y="1.343cm">
            <draw:text-box>
              <text:p><text:span text:style-name="T1">Clear</text:span></text:p>
            </draw:text-box>
          </draw:frame>
          <draw:line draw:style-name="gr9" draw:text-style-name="P2" draw:layer="layout" svg:x1="7.347cm" svg:y1="4.131cm" svg:x2="5.607cm" svg:y2="1.895cm">
            <text:p/>
          </draw:line>
          <draw:frame draw:style-name="gr10" draw:text-style-name="P3" draw:layer="layout" svg:width="1.162cm" svg:height="0.729cm" svg:x="4.932cm" svg:y="1.285cm">
            <draw:text-box>
              <text:p><text:span text:style-name="T1">Cut</text:span></text:p>
            </draw:text-box>
          </draw:frame>
          <draw:line draw:style-name="gr11" draw:text-style-name="P2" draw:layer="layout" svg:x1="8.263cm" svg:y1="4.05cm" svg:x2="7.167cm" svg:y2="1.954cm">
            <text:p/>
          </draw:line>
          <draw:frame draw:style-name="gr12" draw:text-style-name="P3" draw:layer="layout" svg:width="1.493cm" svg:height="0.729cm" svg:x="6.315cm" svg:y="1.267cm">
            <draw:text-box>
              <text:p><text:span text:style-name="T1">Copy</text:span></text:p>
            </draw:text-box>
          </draw:frame>
          <draw:line draw:style-name="gr13" draw:text-style-name="P2" draw:layer="layout" svg:x1="8.894cm" svg:y1="3.948cm" svg:x2="8.806cm" svg:y2="1.974cm">
            <text:p/>
          </draw:line>
          <draw:frame draw:style-name="gr14" draw:text-style-name="P3" draw:layer="layout" svg:width="1.59cm" svg:height="0.729cm" svg:x="8.014cm" svg:y="1.228cm">
            <draw:text-box>
              <text:p><text:span text:style-name="T1">Paste</text:span></text:p>
            </draw:text-box>
          </draw:frame>
          <draw:frame draw:style-name="gr15" draw:text-style-name="P3" draw:layer="layout" svg:width="9.113cm" svg:height="0.729cm" svg:x="9.653cm" svg:y="1.288cm">
            <draw:text-box>
              <text:p><text:span text:style-name="T1">Tell <text:s text:c="3"/>Untell <text:s text:c="2"/>Retell <text:s text:c="2"/>Ask <text:s text:c="3"/>List Module <text:s text:c="3"/>Exit </text:span></text:p>
            </draw:text-box>
          </draw:frame>
          <draw:line draw:style-name="gr16" draw:text-style-name="P2" draw:layer="layout" svg:x1="10.054cm" svg:y1="4.05cm" svg:x2="10.248cm" svg:y2="1.876cm">
            <text:p/>
          </draw:line>
          <draw:line draw:style-name="gr17" draw:text-style-name="P2" draw:layer="layout" svg:x1="11.356cm" svg:y1="4.09cm" svg:x2="11.492cm" svg:y2="1.895cm">
            <text:p/>
          </draw:line>
          <draw:line draw:style-name="gr18" draw:text-style-name="P2" draw:layer="layout" svg:x1="12.17cm" svg:y1="3.989cm" svg:x2="12.873cm" svg:y2="1.875cm">
            <text:p/>
          </draw:line>
          <draw:line draw:style-name="gr18" draw:text-style-name="P2" draw:layer="layout" svg:x1="13.147cm" svg:y1="3.948cm" svg:x2="14.077cm" svg:y2="1.836cm">
            <text:p/>
          </draw:line>
          <draw:line draw:style-name="gr19" draw:text-style-name="P2" draw:layer="layout" svg:x1="14.348cm" svg:y1="3.989cm" svg:x2="15.44cm" svg:y2="1.836cm">
            <text:p/>
          </draw:line>
          <draw:line draw:style-name="gr20" draw:text-style-name="P2" draw:layer="layout" svg:x1="15.406cm" svg:y1="3.989cm" svg:x2="17.987cm" svg:y2="1.85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 draw:shadow="hidden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opacity="50%" draw:shadow-offset-x="0.203cm" draw:shadow-offset-y="0.203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fred Jeusfeld</meta:initial-creator>
    <meta:creation-date>2014-02-21T12:12:03.377881595</meta:creation-date>
    <dc:date>2015-09-23T17:15:11.814230873</dc:date>
    <meta:editing-duration>PT1M37S</meta:editing-duration>
    <meta:editing-cycles>4</meta:editing-cycles>
    <meta:generator>LibreOffice/4.4.5.2$Linux_X86_64 LibreOffice_project/40m0$Build-2</meta:generator>
    <meta:document-statistic meta:object-count="25"/>
  </office:meta>
</office:document-meta>
</file>