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50000027EE9FD982D980BC8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="none" fo:min-height="1.183cm"/>
      <style:paragraph-properties style:writing-mode="lr-tb"/>
    </style:style>
    <style:style style:name="gr5" style:family="graphic" style:parent-style-name="standard">
      <style:graphic-properties draw:stroke="none" draw:fill="none" fo:min-height="0.5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472cm" svg:height="15.908cm" svg:x="3.482cm" svg:y="2.222cm">
            <draw:image xlink:href="Pictures/10000001000003350000027EE9FD982D980BC8C2.png" xlink:type="simple" xlink:show="embed" xlink:actuate="onLoad" draw:mime-type="image/png">
              <text:p/>
            </draw:image>
          </draw:frame>
          <draw:frame draw:style-name="gr2" draw:text-style-name="P3" draw:layer="layout" svg:width="11.191cm" svg:height="0.645cm" svg:x="2.528cm" svg:y="1.205cm">
            <draw:text-box>
              <text:p text:style-name="P2"><text:span text:style-name="T1">Clear <text:s text:c="2"/>Cut <text:s text:c="2"/>Copy <text:s/>Paste <text:s text:c="2"/>Tell <text:s/>Untell <text:s text:c="2"/>Retell <text:s text:c="2"/>Ask <text:s/>List Module <text:s text:c="2"/>Exit</text:span></text:p>
            </draw:text-box>
          </draw:frame>
          <draw:line draw:style-name="gr3" draw:text-style-name="P4" draw:layer="layout" svg:x1="4.441cm" svg:y1="3.473cm" svg:x2="3.237cm" svg:y2="1.725cm">
            <text:p/>
          </draw:line>
          <draw:line draw:style-name="gr3" draw:text-style-name="P4" draw:layer="layout" svg:x1="5.173cm" svg:y1="3.567cm" svg:x2="4.229cm" svg:y2="1.654cm">
            <text:p/>
          </draw:line>
          <draw:line draw:style-name="gr3" draw:text-style-name="P4" draw:layer="layout" svg:x1="6.024cm" svg:y1="3.544cm" svg:x2="5.126cm" svg:y2="1.701cm">
            <text:p/>
          </draw:line>
          <draw:line draw:style-name="gr3" draw:text-style-name="P4" draw:layer="layout" svg:x1="6.614cm" svg:y1="3.567cm" svg:x2="6.119cm" svg:y2="1.677cm">
            <text:p/>
          </draw:line>
          <draw:line draw:style-name="gr3" draw:text-style-name="P4" draw:layer="layout" svg:x1="7.417cm" svg:y1="3.639cm" svg:x2="7.229cm" svg:y2="1.725cm">
            <text:p/>
          </draw:line>
          <draw:line draw:style-name="gr3" draw:text-style-name="P4" draw:layer="layout" svg:x1="8.693cm" svg:y1="3.614cm" svg:x2="8.127cm" svg:y2="1.701cm">
            <text:p/>
          </draw:line>
          <draw:line draw:style-name="gr3" draw:text-style-name="P4" draw:layer="layout" svg:x1="9.142cm" svg:y1="3.638cm" svg:x2="9.402cm" svg:y2="1.749cm">
            <text:p/>
          </draw:line>
          <draw:line draw:style-name="gr3" draw:text-style-name="P4" draw:layer="layout" svg:x1="9.827cm" svg:y1="3.544cm" svg:x2="10.253cm" svg:y2="1.678cm">
            <text:p/>
          </draw:line>
          <draw:line draw:style-name="gr3" draw:text-style-name="P4" draw:layer="layout" svg:x1="10.938cm" svg:y1="3.591cm" svg:x2="11.481cm" svg:y2="1.748cm">
            <text:p/>
          </draw:line>
          <draw:line draw:style-name="gr3" draw:text-style-name="P4" draw:layer="layout" svg:x1="11.788cm" svg:y1="3.544cm" svg:x2="13.159cm" svg:y2="1.654cm">
            <text:p/>
          </draw:line>
          <draw:frame draw:style-name="gr4" draw:text-style-name="P5" draw:layer="layout" svg:width="1.923cm" svg:height="1.433cm" svg:x="1.236cm" svg:y="2.088cm">
            <draw:text-box>
              <text:p><text:span text:style-name="T1">Quick</text:span></text:p>
              <text:p><text:span text:style-name="T1">Connect</text:span></text:p>
            </draw:text-box>
          </draw:frame>
          <draw:line draw:style-name="gr3" draw:text-style-name="P4" draw:layer="layout" svg:x1="3.733cm" svg:y1="3.496cm" svg:x2="2.93cm" svg:y2="2.552cm">
            <text:p/>
          </draw:line>
          <draw:frame draw:style-name="gr4" draw:text-style-name="P5" draw:layer="layout" svg:width="1.923cm" svg:height="1.433cm" svg:x="1.236cm" svg:y="4.263cm">
            <draw:text-box>
              <text:p><text:span text:style-name="T1">User</text:span></text:p>
              <text:p><text:span text:style-name="T1">Queries</text:span></text:p>
            </draw:text-box>
          </draw:frame>
          <draw:line draw:style-name="gr3" draw:text-style-name="P4" draw:layer="layout" svg:x1="3.733cm" svg:y1="4.536cm" svg:x2="2.599cm" svg:y2="4.56cm">
            <text:p/>
          </draw:line>
          <draw:frame draw:style-name="gr4" draw:text-style-name="P5" draw:layer="layout" svg:width="1.93cm" svg:height="1.433cm" svg:x="1.236cm" svg:y="7.146cm">
            <draw:text-box>
              <text:p><text:span text:style-name="T1">Main Telos</text:span></text:p>
              <text:p><text:span text:style-name="T1">Editor</text:span></text:p>
            </draw:text-box>
          </draw:frame>
          <draw:line draw:style-name="gr3" draw:text-style-name="P4" draw:layer="layout" svg:x1="9.969cm" svg:y1="7.749cm" svg:x2="2.553cm" svg:y2="7.797cm">
            <text:p/>
          </draw:line>
          <draw:frame draw:style-name="gr4" draw:text-style-name="P5" draw:layer="layout" svg:width="1.93cm" svg:height="1.433cm" svg:x="1.236cm" svg:y="14.21cm">
            <draw:text-box>
              <text:p><text:span text:style-name="T1">History</text:span></text:p>
              <text:p><text:span text:style-name="T1">Window</text:span></text:p>
            </draw:text-box>
          </draw:frame>
          <draw:line draw:style-name="gr3" draw:text-style-name="P4" draw:layer="layout" svg:x1="9.142cm" svg:y1="14.906cm" svg:x2="2.788cm" svg:y2="14.812cm">
            <text:p/>
          </draw:line>
          <draw:frame draw:style-name="gr4" draw:text-style-name="P5" draw:layer="layout" svg:width="1.923cm" svg:height="1.433cm" svg:x="1.236cm" svg:y="11.067cm">
            <draw:text-box>
              <text:p><text:span text:style-name="T1">Visible</text:span></text:p>
              <text:p><text:span text:style-name="T1">Modules</text:span></text:p>
            </draw:text-box>
          </draw:frame>
          <draw:line draw:style-name="gr3" draw:text-style-name="P4" draw:layer="layout" svg:x1="3.662cm" svg:y1="11.577cm" svg:x2="2.528cm" svg:y2="11.601cm">
            <text:p/>
          </draw:line>
          <draw:frame draw:style-name="gr4" draw:text-style-name="P5" draw:layer="layout" svg:width="1.93cm" svg:height="1.433cm" svg:x="1.236cm" svg:y="16.598cm">
            <draw:text-box>
              <text:p><text:span text:style-name="T1">Status</text:span></text:p>
              <text:p><text:span text:style-name="T1">Bar</text:span></text:p>
            </draw:text-box>
          </draw:frame>
          <draw:line draw:style-name="gr3" draw:text-style-name="P4" draw:layer="layout" svg:x1="3.544cm" svg:y1="17.174cm" svg:x2="2.244cm" svg:y2="17.151cm">
            <text:p/>
          </draw:line>
          <draw:frame draw:style-name="gr4" draw:text-style-name="P5" draw:layer="layout" svg:width="2.756cm" svg:height="1.433cm" svg:x="1.472cm" svg:y="18.064cm">
            <draw:text-box>
              <text:p><text:span text:style-name="T1">Current rollback time</text:span></text:p>
            </draw:text-box>
          </draw:frame>
          <draw:line draw:style-name="gr3" draw:text-style-name="P4" draw:layer="layout" svg:x1="3.615cm" svg:y1="17.907cm" svg:x2="2.953cm" svg:y2="18.333cm">
            <text:p/>
          </draw:line>
          <draw:frame draw:style-name="gr5" draw:text-style-name="P5" draw:layer="layout" svg:width="4.244cm" svg:height="0.777cm" svg:x="9.339cm" svg:y="18.467cm">
            <draw:text-box>
              <text:p><text:span text:style-name="T1">Current module</text:span></text:p>
            </draw:text-box>
          </draw:frame>
          <draw:line draw:style-name="gr3" draw:text-style-name="P4" draw:layer="layout" svg:x1="11.221cm" svg:y1="17.978cm" svg:x2="10.347cm" svg:y2="18.52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5-02T23:14:08.687631566</meta:creation-date>
    <dc:date>2026-05-02T23:29:11.494769429</dc:date>
    <dc:creator>Manfred Jeusfeld</dc:creator>
    <meta:editing-duration>PT4M42S</meta:editing-duration>
    <meta:editing-cycles>1</meta:editing-cycles>
    <meta:document-statistic meta:object-count="29"/>
    <meta:generator>LibreOffice/7.3.7.2$Linux_X86_64 LibreOffice_project/30$Build-2</meta:generator>
  </office:meta>
</office:document-meta>
</file>