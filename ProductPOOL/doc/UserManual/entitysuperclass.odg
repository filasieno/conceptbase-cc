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cccccc" draw:fill-color="#eeeeee" draw:textarea-horizontal-align="justify" draw:textarea-vertical-align="middle" draw:auto-grow-height="false" fo:min-height="6.381cm" fo:min-width="8.725cm"/>
    </style:style>
    <style:style style:name="gr2" style:family="graphic" style:parent-style-name="standard">
      <style:graphic-properties draw:stroke="dash" draw:stroke-dash="Dashed_20__28_var_29__20_3" svg:stroke-width="0.076cm" svg:stroke-color="#008000" draw:marker-start-width="0.314cm" draw:marker-end="msArrowEnd_20_5" draw:marker-end-width="0.21cm" draw:marker-end-center="false" draw:fill="none" draw:fill-color="#ffffff" draw:textarea-horizontal-align="center" draw:textarea-vertical-align="middle" fo:padding-top="0.038cm" fo:padding-bottom="0.038cm" fo:padding-left="0.038cm" fo:padding-right="0.038cm" draw:shadow="hidden" draw:shadow-color="#808080"/>
    </style:style>
    <style:style style:name="gr3" style:family="graphic" style:parent-style-name="standard">
      <style:graphic-properties draw:stroke="solid" svg:stroke-width="0.076cm" svg:stroke-color="#000000" draw:marker-start-width="0.314cm" draw:fill="none" draw:fill-color="#00b8ff" draw:textarea-horizontal-align="center" draw:textarea-vertical-align="middle" fo:min-height="0.963cm" fo:padding-top="0.038cm" fo:padding-bottom="0.038cm" fo:padding-left="0.038cm" fo:padding-right="0.038cm" draw:shadow="hidden" draw:shadow-color="#808080"/>
    </style:style>
    <style:style style:name="gr4" style:family="graphic" style:parent-style-name="standard">
      <style:graphic-properties draw:stroke="none" svg:stroke-width="0.076cm" draw:marker-start-width="0.314cm" draw:fill="none" draw:textarea-horizontal-align="left" draw:textarea-vertical-align="top" draw:auto-grow-height="true" draw:auto-grow-width="true" fo:min-height="0.703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solid" svg:stroke-width="0.076cm" svg:stroke-color="#000000" draw:marker-start-width="0.314cm" draw:fill="none" draw:fill-color="#00b8ff" draw:textarea-horizontal-align="center" draw:textarea-vertical-align="middle" fo:min-height="0.962cm" fo:padding-top="0.038cm" fo:padding-bottom="0.038cm" fo:padding-left="0.038cm" fo:padding-right="0.038cm" draw:shadow="hidden" draw:shadow-color="#808080"/>
    </style:style>
    <style:style style:name="gr6" style:family="graphic" style:parent-style-name="standard">
      <style:graphic-properties draw:stroke="none" svg:stroke-width="0.076cm" draw:marker-start-width="0.314cm" draw:fill="none" draw:textarea-horizontal-align="left" draw:textarea-vertical-align="top" draw:auto-grow-height="true" draw:auto-grow-width="true" fo:min-height="0.702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dash" draw:stroke-dash="Fine_20_Dashed" svg:stroke-color="#cccccc" draw:fill-color="#eeeeee" draw:textarea-horizontal-align="justify" draw:textarea-vertical-align="middle" draw:auto-grow-height="false" fo:min-height="6.447cm" fo:min-width="8.791cm"/>
    </style:style>
    <style:style style:name="gr8" style:family="graphic" style:parent-style-name="standard">
      <style:graphic-properties draw:stroke="none" svg:stroke-width="0.076cm" svg:stroke-color="#000000" draw:marker-start-width="0.314cm" draw:fill="none" draw:textarea-horizontal-align="left" draw:textarea-vertical-align="top" draw:auto-grow-height="true" draw:auto-grow-width="true" fo:min-height="0.702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svg:stroke-width="0.076cm" svg:stroke-color="#000000" draw:marker-start-width="0.314cm" draw:fill="none" draw:fill-color="#ffffff" draw:textarea-horizontal-align="left" draw:auto-grow-height="true" draw:auto-grow-width="true" fo:min-height="0.556cm" fo:min-width="0.688cm"/>
    </style:style>
    <style:style style:name="gr10" style:family="graphic" style:parent-style-name="objectwithoutfill">
      <style:graphic-properties svg:stroke-width="0.051cm" draw:marker-start-width="0.355cm" draw:marker-end="Triangle_20_unfilled" draw:marker-end-width="0.55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76cm" svg:stroke-color="#000000" draw:marker-start-width="0.314cm" draw:fill="none" draw:textarea-horizontal-align="center" draw:textarea-vertical-align="middle" draw:auto-grow-height="true" draw:auto-grow-width="true" fo:min-height="0.702cm" fo:min-width="0cm" fo:padding-top="0.13cm" fo:padding-bottom="0.13cm" fo:padding-left="0.25cm" fo:padding-right="0.2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="none" draw:fill-color="#00b8ff"/>
      <style:paragraph-properties fo:text-align="center"/>
      <style:text-properties fo:font-size="24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/>
      <style:paragraph-properties fo:margin-left="0cm" fo:margin-right="0cm" fo:text-align="center" fo:text-indent="0cm" style:writing-mode="lr-tb"/>
      <style:text-properties style:font-name="Arial" fo:font-size="14pt" style:font-size-asian="14pt" style:font-size-complex="14pt"/>
    </style:style>
    <style:style style:name="P6" style:family="paragraph">
      <loext:graphic-properties draw:fill="none"/>
      <style:paragraph-properties fo:margin-left="0cm" fo:margin-right="0cm" fo:text-align="center" fo:text-indent="0cm" style:writing-mode="lr-tb"/>
      <style:text-properties fo:color="#000000" style:font-name="Arial" fo:font-size="14pt" style:font-size-asian="14pt" style:font-size-complex="14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Arial"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000000" style:font-name="Arial" fo:font-size="14pt" style:font-size-asian="14pt" style:font-size-complex="14pt"/>
    </style:style>
    <style:style style:name="T3" style:family="text">
      <style:text-properties style:font-name="Arial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225cm" svg:height="6.631cm" svg:x="1cm" svg:y="3.593cm">
            <text:p/>
            <draw:enhanced-geometry svg:viewBox="0 0 21600 21600" draw:type="rectangle" draw:enhanced-path="M 0 0 L 21600 0 21600 21600 0 21600 0 0 Z N"/>
          </draw:custom-shape>
          <draw:path draw:style-name="gr2" draw:text-style-name="P2" draw:layer="layout" svg:width="5.974cm" svg:height="0.689cm" draw:transform="rotate (1.33255888389767) translate (2.86906784193815cm 10.8367881983205cm)" svg:viewBox="0 0 5975 690" svg:d="M0 39c1283 1268 4190 363 5975-39">
            <text:p/>
          </draw:path>
          <draw:g>
            <draw:rect draw:style-name="gr3" draw:text-style-name="P3" draw:layer="layout" svg:width="2.692cm" svg:height="0.765cm" svg:x="3.123cm" svg:y="1.752cm">
              <text:p/>
            </draw:rect>
            <draw:rect draw:style-name="gr4" draw:text-style-name="P5" draw:layer="layout" svg:width="2.692cm" svg:height="0.765cm" svg:x="3.123cm" svg:y="1.752cm">
              <text:p text:style-name="P4"><text:span text:style-name="T1">EntityType</text:span></text:p>
            </draw:rect>
          </draw:g>
          <draw:g>
            <draw:rect draw:style-name="gr5" draw:text-style-name="P3" draw:layer="layout" svg:width="1.624cm" svg:height="0.816cm" svg:x="5.475cm" svg:y="10.912cm">
              <text:p/>
            </draw:rect>
            <draw:rect draw:style-name="gr6" draw:text-style-name="P5" draw:layer="layout" svg:width="1.624cm" svg:height="0.816cm" svg:x="5.475cm" svg:y="10.912cm">
              <text:p text:style-name="P4"><text:span text:style-name="T1">mary</text:span></text:p>
            </draw:rect>
          </draw:g>
          <draw:path draw:style-name="gr2" draw:text-style-name="P2" draw:layer="layout" svg:width="4.061cm" svg:height="0.547cm" draw:transform="rotate (2.07414928307006) translate (6.794cm 6.239cm)" svg:viewBox="0 0 4062 548" svg:d="M0 0c1223 1233 2708 0 4062 0">
            <text:p/>
          </draw:path>
          <draw:line draw:style-name="gr2" draw:text-style-name="P2" draw:layer="layout" svg:x1="6.402cm" svg:y1="10.78cm" svg:x2="6.37cm" svg:y2="9.571cm">
            <text:p/>
          </draw:line>
          <draw:path draw:style-name="gr2" draw:text-style-name="P2" draw:layer="layout" svg:width="4.144cm" svg:height="0.495cm" draw:transform="rotate (1.03271131840504) translate (1.79476154378311cm 5.95260830414919cm)" svg:viewBox="0 0 4145 496" svg:d="M0 496c1426-1116 2763 0 4145 0">
            <text:p/>
          </draw:path>
          <draw:g>
            <draw:rect draw:style-name="gr5" draw:text-style-name="P3" draw:layer="layout" svg:width="1.689cm" svg:height="0.783cm" svg:x="1.839cm" svg:y="10.912cm">
              <text:p/>
            </draw:rect>
            <draw:rect draw:style-name="gr6" draw:text-style-name="P5" draw:layer="layout" svg:width="1.689cm" svg:height="0.783cm" svg:x="1.839cm" svg:y="10.912cm">
              <text:p text:style-name="P4"><text:span text:style-name="T1">p346</text:span></text:p>
            </draw:rect>
          </draw:g>
          <draw:line draw:style-name="gr2" draw:text-style-name="P2" draw:layer="layout" svg:x1="2.515cm" svg:y1="10.748cm" svg:x2="2.483cm" svg:y2="9.963cm">
            <text:p/>
          </draw:line>
          <draw:path draw:style-name="gr2" draw:text-style-name="P2" draw:layer="layout" svg:width="5.949cm" svg:height="0.992cm" draw:transform="rotate (1.89263504086265) translate (5.34995394033391cm 10.9247339421772cm)" svg:viewBox="0 0 5950 993" svg:d="M0 559c1323-1282 4173-20 5950 434">
            <text:p/>
          </draw:path>
          <draw:custom-shape draw:style-name="gr7" draw:text-style-name="P1" draw:layer="layout" svg:width="9.291cm" svg:height="6.697cm" svg:x="10.504cm" svg:y="3.593cm">
            <text:p/>
            <draw:enhanced-geometry svg:viewBox="0 0 21600 21600" draw:type="rectangle" draw:enhanced-path="M 0 0 L 21600 0 21600 21600 0 21600 0 0 Z N"/>
          </draw:custom-shape>
          <draw:g>
            <draw:rect draw:style-name="gr3" draw:text-style-name="P3" draw:layer="layout" svg:width="2.692cm" svg:height="0.765cm" svg:x="12.677cm" svg:y="1.752cm">
              <text:p/>
            </draw:rect>
            <draw:rect draw:style-name="gr4" draw:text-style-name="P5" draw:layer="layout" svg:width="2.692cm" svg:height="0.765cm" svg:x="12.677cm" svg:y="1.752cm">
              <text:p text:style-name="P4"><text:span text:style-name="T1">EntityType</text:span></text:p>
            </draw:rect>
          </draw:g>
          <draw:g xml:id="id2" draw:id="id2">
            <draw:rect draw:style-name="gr5" draw:text-style-name="P3" draw:layer="layout" svg:width="2.529cm" svg:height="0.756cm" svg:x="15.094cm" svg:y="6.398cm">
              <text:p/>
            </draw:rect>
            <draw:rect draw:style-name="gr8" draw:text-style-name="P6" draw:layer="layout" svg:width="2.529cm" svg:height="0.756cm" svg:x="15.094cm" svg:y="6.398cm">
              <text:p text:style-name="P4"><text:span text:style-name="T2">Employee</text:span></text:p>
            </draw:rect>
          </draw:g>
          <draw:g>
            <draw:rect draw:style-name="gr5" draw:text-style-name="P3" draw:layer="layout" svg:width="1.624cm" svg:height="0.816cm" svg:x="14.856cm" svg:y="10.912cm">
              <text:p/>
            </draw:rect>
            <draw:rect draw:style-name="gr6" draw:text-style-name="P5" draw:layer="layout" svg:width="1.624cm" svg:height="0.816cm" svg:x="14.856cm" svg:y="10.912cm">
              <text:p text:style-name="P4"><text:span text:style-name="T1">mary</text:span></text:p>
            </draw:rect>
          </draw:g>
          <draw:line draw:style-name="gr2" draw:text-style-name="P2" draw:layer="layout" svg:x1="15.762cm" svg:y1="10.942cm" svg:x2="15.763cm" svg:y2="9.603cm">
            <text:p/>
          </draw:line>
          <draw:g xml:id="id6" draw:id="id6">
            <draw:rect draw:style-name="gr3" draw:text-style-name="P3" draw:layer="layout" svg:width="1.749cm" svg:height="0.806cm" svg:x="13.098cm" svg:y="4.062cm">
              <text:p/>
            </draw:rect>
            <draw:rect draw:style-name="gr4" draw:text-style-name="P5" draw:layer="layout" svg:width="1.749cm" svg:height="0.806cm" svg:x="13.098cm" svg:y="4.062cm">
              <text:p text:style-name="P4"><text:span text:style-name="T1">Entity</text:span></text:p>
            </draw:rect>
          </draw:g>
          <draw:frame draw:style-name="gr9" draw:text-style-name="P8" draw:layer="layout" svg:width="1.188cm" svg:height="0.806cm" svg:x="18.584cm" svg:y="3.736cm">
            <draw:text-box>
              <text:p text:style-name="P7"><text:span text:style-name="T3">M1</text:span></text:p>
            </draw:text-box>
          </draw:frame>
          <draw:g xml:id="id4" draw:id="id4">
            <draw:rect draw:style-name="gr5" draw:text-style-name="P3" draw:layer="layout" svg:width="1.972cm" svg:height="0.822cm" svg:x="10.887cm" svg:y="6.3cm">
              <text:p/>
            </draw:rect>
            <draw:rect draw:style-name="gr8" draw:text-style-name="P6" draw:layer="layout" svg:width="1.972cm" svg:height="0.822cm" svg:x="10.887cm" svg:y="6.3cm">
              <text:p text:style-name="P4"><text:span text:style-name="T2">Project</text:span></text:p>
            </draw:rect>
          </draw:g>
          <draw:g xml:id="id1" draw:id="id1">
            <draw:rect draw:style-name="gr5" draw:text-style-name="P3" draw:layer="layout" svg:width="2.365cm" svg:height="0.755cm" svg:x="14.605cm" svg:y="8.75cm">
              <text:p/>
            </draw:rect>
            <draw:rect draw:style-name="gr8" draw:text-style-name="P6" draw:layer="layout" svg:width="2.365cm" svg:height="0.755cm" svg:x="14.605cm" svg:y="8.75cm">
              <text:p text:style-name="P4"><text:span text:style-name="T2">Manager</text:span></text:p>
            </draw:rect>
          </draw:g>
          <draw:connector draw:style-name="gr10" draw:text-style-name="P9" draw:layer="layout" draw:line-skew="0.117cm" svg:x1="15.787cm" svg:y1="8.75cm" svg:x2="16.358cm" svg:y2="7.154cm" draw:start-shape="id1" draw:start-glue-point="0" draw:end-shape="id2" draw:end-glue-point="2" svg:d="M15787 8750v-681h571v-915" svg:viewBox="0 0 572 1597">
            <text:p/>
          </draw:connector>
          <draw:g xml:id="id3" draw:id="id3">
            <draw:rect draw:style-name="gr5" draw:text-style-name="P3" draw:layer="layout" svg:width="2.515cm" svg:height="1.311cm" svg:x="10.616cm" svg:y="8.62cm">
              <text:p/>
            </draw:rect>
            <draw:rect draw:style-name="gr11" draw:text-style-name="P6" draw:layer="layout" svg:width="2.515cm" svg:height="1.311cm" svg:x="10.616cm" svg:y="8.62cm">
              <text:p text:style-name="P4"><text:span text:style-name="T2">Completed</text:span></text:p>
              <text:p text:style-name="P4"><text:span text:style-name="T2">Project</text:span></text:p>
            </draw:rect>
          </draw:g>
          <draw:connector draw:style-name="gr10" draw:text-style-name="P9" draw:layer="layout" svg:x1="11.873cm" svg:y1="8.62cm" svg:x2="11.873cm" svg:y2="7.122cm" draw:start-shape="id3" draw:start-glue-point="0" draw:end-shape="id4" draw:end-glue-point="2" svg:d="M11873 8620v-1498" svg:viewBox="0 0 1 1499">
            <text:p/>
          </draw:connector>
          <draw:g xml:id="id5" draw:id="id5">
            <draw:rect draw:style-name="gr5" draw:text-style-name="P3" draw:layer="layout" svg:width="2.384cm" svg:height="1.376cm" svg:x="17.299cm" svg:y="8.458cm">
              <text:p/>
            </draw:rect>
            <draw:rect draw:style-name="gr11" draw:text-style-name="P6" draw:layer="layout" svg:width="2.384cm" svg:height="1.376cm" svg:x="17.299cm" svg:y="8.458cm">
              <text:p text:style-name="P4"><text:span text:style-name="T2">Regular</text:span></text:p>
              <text:p text:style-name="P4"><text:span text:style-name="T2">Employee</text:span></text:p>
            </draw:rect>
          </draw:g>
          <draw:connector draw:style-name="gr10" draw:text-style-name="P9" draw:layer="layout" draw:line-skew="0.263cm" svg:x1="18.491cm" svg:y1="8.458cm" svg:x2="16.358cm" svg:y2="7.154cm" draw:start-shape="id5" draw:start-glue-point="0" draw:end-shape="id2" draw:end-glue-point="2" svg:d="M18491 8458v-389h-2133v-915" svg:viewBox="0 0 2134 1305">
            <text:p/>
          </draw:connector>
          <draw:g>
            <draw:rect draw:style-name="gr5" draw:text-style-name="P3" draw:layer="layout" svg:width="1.689cm" svg:height="0.783cm" svg:x="11.296cm" svg:y="10.912cm">
              <text:p/>
            </draw:rect>
            <draw:rect draw:style-name="gr6" draw:text-style-name="P5" draw:layer="layout" svg:width="1.689cm" svg:height="0.783cm" svg:x="11.296cm" svg:y="10.912cm">
              <text:p text:style-name="P4"><text:span text:style-name="T1">p346</text:span></text:p>
            </draw:rect>
          </draw:g>
          <draw:line draw:style-name="gr2" draw:text-style-name="P2" draw:layer="layout" svg:x1="12.103cm" svg:y1="10.909cm" svg:x2="12.104cm" svg:y2="9.963cm">
            <text:p/>
          </draw:line>
          <draw:connector draw:style-name="gr10" draw:text-style-name="P9" draw:layer="layout" draw:line-skew="0.166cm" svg:x1="11.873cm" svg:y1="6.3cm" svg:x2="13.972cm" svg:y2="4.868cm" draw:start-shape="id4" draw:start-glue-point="0" draw:end-shape="id6" draw:end-glue-point="2" svg:d="M11873 6300v-550h2099v-882" svg:viewBox="0 0 2100 1433">
            <text:p/>
          </draw:connector>
          <draw:connector draw:style-name="gr10" draw:text-style-name="P9" draw:layer="layout" draw:line-skew="0.117cm" svg:x1="16.358cm" svg:y1="6.398cm" svg:x2="13.972cm" svg:y2="4.868cm" draw:start-shape="id2" draw:start-glue-point="0" draw:end-shape="id6" draw:end-glue-point="2" svg:d="M16358 6398v-648h-2386v-882" svg:viewBox="0 0 2387 1531">
            <text:p/>
          </draw:connector>
          <draw:line draw:style-name="gr2" draw:text-style-name="P2" draw:layer="layout" svg:x1="14.097cm" svg:y1="3.952cm" svg:x2="14.064cm" svg:y2="2.579cm">
            <text:p/>
          </draw:line>
          <draw:g xml:id="id8" draw:id="id8">
            <draw:rect draw:style-name="gr5" draw:text-style-name="P3" draw:layer="layout" svg:width="2.529cm" svg:height="0.756cm" svg:x="5.478cm" svg:y="6.352cm">
              <text:p/>
            </draw:rect>
            <draw:rect draw:style-name="gr8" draw:text-style-name="P6" draw:layer="layout" svg:width="2.529cm" svg:height="0.756cm" svg:x="5.478cm" svg:y="6.352cm">
              <text:p text:style-name="P4"><text:span text:style-name="T2">Employee</text:span></text:p>
            </draw:rect>
          </draw:g>
          <draw:g>
            <draw:rect draw:style-name="gr3" draw:text-style-name="P3" draw:layer="layout" svg:width="1.749cm" svg:height="0.806cm" svg:x="3.482cm" svg:y="4.016cm">
              <text:p/>
            </draw:rect>
            <draw:rect draw:style-name="gr4" draw:text-style-name="P5" draw:layer="layout" svg:width="1.749cm" svg:height="0.806cm" svg:x="3.482cm" svg:y="4.016cm">
              <text:p text:style-name="P4"><text:span text:style-name="T1">Entity</text:span></text:p>
            </draw:rect>
          </draw:g>
          <draw:frame draw:style-name="gr9" draw:text-style-name="P8" draw:layer="layout" svg:width="1.188cm" svg:height="0.806cm" svg:x="8.968cm" svg:y="3.69cm">
            <draw:text-box>
              <text:p text:style-name="P7"><text:span text:style-name="T3">M1</text:span></text:p>
            </draw:text-box>
          </draw:frame>
          <draw:g xml:id="id10" draw:id="id10">
            <draw:rect draw:style-name="gr5" draw:text-style-name="P3" draw:layer="layout" svg:width="1.972cm" svg:height="0.822cm" svg:x="1.271cm" svg:y="6.254cm">
              <text:p/>
            </draw:rect>
            <draw:rect draw:style-name="gr8" draw:text-style-name="P6" draw:layer="layout" svg:width="1.972cm" svg:height="0.822cm" svg:x="1.271cm" svg:y="6.254cm">
              <text:p text:style-name="P4"><text:span text:style-name="T2">Project</text:span></text:p>
            </draw:rect>
          </draw:g>
          <draw:g xml:id="id7" draw:id="id7">
            <draw:rect draw:style-name="gr5" draw:text-style-name="P3" draw:layer="layout" svg:width="2.365cm" svg:height="0.755cm" svg:x="4.989cm" svg:y="8.704cm">
              <text:p/>
            </draw:rect>
            <draw:rect draw:style-name="gr8" draw:text-style-name="P6" draw:layer="layout" svg:width="2.365cm" svg:height="0.755cm" svg:x="4.989cm" svg:y="8.704cm">
              <text:p text:style-name="P4"><text:span text:style-name="T2">Manager</text:span></text:p>
            </draw:rect>
          </draw:g>
          <draw:connector draw:style-name="gr10" draw:text-style-name="P9" draw:layer="layout" draw:line-skew="0.117cm" svg:x1="6.171cm" svg:y1="8.704cm" svg:x2="6.742cm" svg:y2="7.108cm" draw:start-shape="id7" draw:start-glue-point="0" draw:end-shape="id8" draw:end-glue-point="2" svg:d="M6171 8704v-681h571v-915" svg:viewBox="0 0 572 1597">
            <text:p/>
          </draw:connector>
          <draw:g xml:id="id9" draw:id="id9">
            <draw:rect draw:style-name="gr5" draw:text-style-name="P3" draw:layer="layout" svg:width="2.515cm" svg:height="1.311cm" svg:x="1cm" svg:y="8.574cm">
              <text:p/>
            </draw:rect>
            <draw:rect draw:style-name="gr11" draw:text-style-name="P6" draw:layer="layout" svg:width="2.515cm" svg:height="1.311cm" svg:x="1cm" svg:y="8.574cm">
              <text:p text:style-name="P4"><text:span text:style-name="T2">Completed</text:span></text:p>
              <text:p text:style-name="P4"><text:span text:style-name="T2">Project</text:span></text:p>
            </draw:rect>
          </draw:g>
          <draw:connector draw:style-name="gr10" draw:text-style-name="P9" draw:layer="layout" svg:x1="2.257cm" svg:y1="8.574cm" svg:x2="2.257cm" svg:y2="7.076cm" draw:start-shape="id9" draw:start-glue-point="0" draw:end-shape="id10" draw:end-glue-point="2" svg:d="M2257 8574v-1498" svg:viewBox="0 0 1 1499">
            <text:p/>
          </draw:connector>
          <draw:g xml:id="id11" draw:id="id11">
            <draw:rect draw:style-name="gr5" draw:text-style-name="P3" draw:layer="layout" svg:width="2.384cm" svg:height="1.376cm" svg:x="7.683cm" svg:y="8.412cm">
              <text:p/>
            </draw:rect>
            <draw:rect draw:style-name="gr11" draw:text-style-name="P6" draw:layer="layout" svg:width="2.384cm" svg:height="1.376cm" svg:x="7.683cm" svg:y="8.412cm">
              <text:p text:style-name="P4"><text:span text:style-name="T2">Regular</text:span></text:p>
              <text:p text:style-name="P4"><text:span text:style-name="T2">Employee</text:span></text:p>
            </draw:rect>
          </draw:g>
          <draw:connector draw:style-name="gr10" draw:text-style-name="P9" draw:layer="layout" draw:line-skew="0.263cm" svg:x1="8.875cm" svg:y1="8.412cm" svg:x2="6.742cm" svg:y2="7.108cm" draw:start-shape="id11" draw:start-glue-point="0" draw:end-shape="id8" draw:end-glue-point="2" svg:d="M8875 8412v-389h-2133v-915" svg:viewBox="0 0 2134 130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0.105cm" draw:distance="0.079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8:22:35.407332068</meta:creation-date>
    <dc:date>2016-02-22T15:21:09.548763552</dc:date>
    <meta:editing-duration>PT1H15M20S</meta:editing-duration>
    <meta:editing-cycles>10</meta:editing-cycles>
    <meta:generator>LibreOffice/4.4.6.3$Linux_X86_64 LibreOffice_project/40m0$Build-3</meta:generator>
    <meta:document-statistic meta:object-count="76"/>
  </office:meta>
</office:document-meta>
</file>