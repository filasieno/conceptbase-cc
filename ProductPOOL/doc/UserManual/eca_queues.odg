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25cm" svg:stroke-color="#000000" draw:marker-start-width="0.33cm" draw:marker-end-width="0.33cm" draw:fill="none" draw:fill-color="#ffffff" draw:textarea-horizontal-align="left" draw:auto-grow-height="true" draw:auto-grow-width="false" fo:min-height="0cm" fo:min-width="9.493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draw:marker-start-width="0.33cm" draw:marker-end="Arrow" draw:marker-end-width="0.33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style:text-position="sub 58%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72cm" svg:height="1.16cm" svg:x="7.172cm" svg:y="0.24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02cm" svg:height="1.16cm" svg:x="6.534cm" svg:y="0.24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15cm" svg:height="1.16cm" svg:x="5.883cm" svg:y="0.2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84cm" svg:height="1.149cm" svg:x="5.202cm" svg:y="0.2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cm" svg:height="1.16cm" svg:x="4.475cm" svg:y="0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84cm" svg:height="1.16cm" svg:x="3.757cm" svg:y="0.2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84cm" svg:height="1.16cm" svg:x="3.052cm" svg:y="0.25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1.031cm" svg:height="0.962cm" svg:x="1.332cm" svg:y="0.357cm">
            <draw:text-box>
              <text:p>q:</text:p>
            </draw:text-box>
          </draw:frame>
          <draw:frame draw:style-name="gr4" draw:layer="layout" svg:width="7.099cm" svg:height="1.195cm" svg:x="3.032cm" svg:y="0.231cm">
            <draw:text-box>
              <text:p>t<text:span text:style-name="T1">1 </text:span><text:s/>t<text:span text:style-name="T1">2</text:span> ... t<text:span text:style-name="T1">i-1</text:span> t<text:span text:style-name="T1">i</text:span> <text:s/>... t<text:span text:style-name="T1">j</text:span> <text:s text:c="3"/></text:p>
            </draw:text-box>
          </draw:frame>
          <draw:line draw:style-name="gr5" draw:text-style-name="P1" draw:layer="layout" svg:x1="3.757cm" svg:y1="0.251cm" svg:x2="3.757cm" svg:y2="1.416cm">
            <text:p/>
          </draw:line>
          <draw:line draw:style-name="gr5" draw:text-style-name="P1" draw:layer="layout" svg:x1="4.458cm" svg:y1="0.251cm" svg:x2="4.458cm" svg:y2="1.416cm">
            <text:p/>
          </draw:line>
          <draw:line draw:style-name="gr5" draw:text-style-name="P1" draw:layer="layout" svg:x1="5.192cm" svg:y1="0.251cm" svg:x2="5.192cm" svg:y2="1.416cm">
            <text:p/>
          </draw:line>
          <draw:line draw:style-name="gr5" draw:text-style-name="P1" draw:layer="layout" svg:x1="5.861cm" svg:y1="0.251cm" svg:x2="5.861cm" svg:y2="1.416cm">
            <text:p/>
          </draw:line>
          <draw:line draw:style-name="gr5" draw:text-style-name="P1" draw:layer="layout" svg:x1="6.515cm" svg:y1="0.251cm" svg:x2="6.515cm" svg:y2="1.416cm">
            <text:p/>
          </draw:line>
          <draw:line draw:style-name="gr5" draw:text-style-name="P1" draw:layer="layout" svg:x1="7.152cm" svg:y1="0.251cm" svg:x2="7.152cm" svg:y2="1.416cm">
            <text:p/>
          </draw:line>
          <draw:line draw:style-name="gr5" draw:text-style-name="P1" draw:layer="layout" svg:x1="7.853cm" svg:y1="0.251cm" svg:x2="7.853cm" svg:y2="1.416cm">
            <text:p/>
          </draw:line>
          <draw:line draw:style-name="gr5" draw:text-style-name="P1" draw:layer="layout" svg:x1="8.442cm" svg:y1="0.251cm" svg:x2="8.442cm" svg:y2="1.416cm">
            <text:p/>
          </draw:line>
          <draw:line draw:style-name="gr6" draw:text-style-name="P1" draw:layer="layout" svg:x1="5.573cm" svg:y1="2.316cm" svg:x2="5.573cm" svg:y2="1.471cm">
            <text:p/>
          </draw:line>
          <draw:line draw:style-name="gr6" draw:text-style-name="P1" draw:layer="layout" svg:x1="8.155cm" svg:y1="2.301cm" svg:x2="8.155cm" svg:y2="1.456cm">
            <text:p/>
          </draw:line>
          <draw:frame draw:style-name="gr3" draw:text-style-name="P2" draw:layer="layout" svg:width="1.827cm" svg:height="0.645cm" svg:x="4.649cm" svg:y="2.299cm">
            <draw:text-box>
              <text:p><text:span text:style-name="T2">last fired</text:span></text:p>
            </draw:text-box>
          </draw:frame>
          <draw:frame draw:style-name="gr3" draw:text-style-name="P2" draw:layer="layout" svg:width="1.869cm" svg:height="0.645cm" svg:x="7.216cm" svg:y="2.284cm">
            <draw:text-box>
              <text:p><text:span text:style-name="T2">next fre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fred Jeusfeld</meta:initial-creator>
    <meta:creation-date>2009-04-28T16:48:26</meta:creation-date>
    <dc:date>2011-12-01T15:39:41</dc:date>
    <dc:creator>Manfred Jeusfeld</dc:creator>
    <meta:editing-duration>PT38M40S</meta:editing-duration>
    <meta:editing-cycles>10</meta:editing-cycles>
    <meta:generator>LibreOffice/3.3$Unix LibreOffice_project/330m19$Build-202</meta:generator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