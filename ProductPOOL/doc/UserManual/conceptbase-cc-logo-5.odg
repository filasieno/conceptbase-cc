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2.672cm"/>
    </style:style>
    <style:style style:name="gr2" style:family="graphic" style:parent-style-name="objectwithoutfill">
      <style:graphic-properties svg:stroke-width="0.254cm" svg:stroke-color="#2300dc" draw:marker-start-width="0.686cm" draw:marker-end-width="0.686cm" draw:fill="none" draw:textarea-horizontal-align="center" draw:textarea-vertical-align="middle" fo:padding-top="0.127cm" fo:padding-bottom="0.127cm" fo:padding-left="0.127cm" fo:padding-right="0.127cm"/>
    </style:style>
    <style:style style:name="gr3" style:family="graphic" style:parent-style-name="standard">
      <style:graphic-properties draw:stroke="none" svg:stroke-width="0cm" draw:marker-start-width="0.305cm" draw:marker-end-width="0.305cm" draw:fill-color="#ff6633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44pt" fo:font-weight="bold" style:font-size-asian="44pt" style:font-size-complex="44pt"/>
    </style:style>
    <style:style style:name="P3" style:family="paragraph">
      <style:paragraph-properties fo:text-align="center"/>
      <style:text-properties fo:font-family="Arial" style:font-family-generic="swiss" style:font-pitch="variable" fo:font-size="54pt"/>
    </style:style>
    <style:style style:name="P4" style:family="paragraph">
      <style:paragraph-properties fo:text-align="center"/>
    </style:style>
    <style:style style:name="T1" style:family="text">
      <style:text-properties fo:font-family="FreeSans" style:font-family-generic="swiss" style:font-pitch="variable" fo:font-size="44pt" fo:font-weight="bold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12.672cm" svg:height="1.555cm" svg:x="1.436cm" svg:y="1.291cm">
            <draw:text-box>
              <text:p text:style-name="P1"><text:span text:style-name="T1">ConceptBase <text:s/>cc</text:span></text:p>
            </draw:text-box>
          </draw:frame>
          <draw:g>
            <draw:polyline draw:style-name="gr2" draw:text-style-name="P3" draw:layer="layout" svg:width="7.772cm" svg:height="1.941cm" svg:x="6.541cm" svg:y="1.021cm" svg:viewBox="0 0 7773 1942" draw:points="0,1942 7769,1942 7773,4 5279,0 5279,888">
              <text:p/>
            </draw:polyline>
            <draw:ellipse draw:style-name="gr3" draw:text-style-name="P3" draw:layer="layout" svg:width="0.608cm" svg:height="0.594cm" svg:x="11.512cm" svg:y="1.992cm">
              <text:p/>
            </draw:ellipse>
            <draw:polyline draw:style-name="gr2" draw:text-style-name="P4" draw:layer="layout" svg:width="10.349cm" svg:height="1.939cm" svg:x="1.156cm" svg:y="1.023cm" svg:viewBox="0 0 10350 1940" draw:points="5031,1940 1,1940 0,8 10350,0">
              <text:p/>
            </draw:poly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15.5cm" fo:page-height="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Manfred Jeusfeld</meta:initial-creator>
    <meta:creation-date>2004-06-15T14:14:51</meta:creation-date>
    <dc:creator>Manfred Jeusfeld</dc:creator>
    <dc:date>2008-02-18T13:48:27</dc:date>
    <meta:printed-by>Manfred Jeusfeld</meta:printed-by>
    <meta:print-date>2004-06-15T15:00:41</meta:print-date>
    <meta:editing-cycles>14</meta:editing-cycles>
    <meta:editing-duration>PT2H54M1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