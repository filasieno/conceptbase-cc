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800000027DF1A6927266103C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.302cm" svg:x="2.656cm" svg:y="2.072cm">
          <draw:image xlink:href="Pictures/100000010000023800000027DF1A6927266103C5.png" xlink:type="simple" xlink:show="embed" xlink:actuate="onLoad" draw:mime-type="image/png">
            <text:p/>
          </draw:image>
        </draw:frame>
        <draw:frame draw:style-name="gr2" draw:text-style-name="P2" draw:layer="layout" svg:width="3.038cm" svg:height="0.887cm" svg:x="1cm" svg:y="1.03cm">
          <draw:text-box>
            <text:p><text:span text:style-name="T1">Open new frame</text:span></text:p>
            <text:p><text:span text:style-name="T1">(without connection)</text:span></text:p>
          </draw:text-box>
        </draw:frame>
        <draw:frame draw:style-name="gr2" draw:text-style-name="P2" draw:layer="layout" svg:width="2.928cm" svg:height="0.569cm" svg:x="3.527cm" svg:y="3.729cm">
          <draw:text-box>
            <text:p><text:span text:style-name="T1">Load &amp; Save graph</text:span></text:p>
          </draw:text-box>
        </draw:frame>
        <draw:frame draw:style-name="gr2" draw:text-style-name="P2" draw:layer="layout" svg:width="2.221cm" svg:height="0.887cm" svg:x="5.519cm" svg:y="1cm">
          <draw:text-box>
            <text:p><text:span text:style-name="T1">Hide selected</text:span></text:p>
            <text:p><text:span text:style-name="T1">objects</text:span></text:p>
          </draw:text-box>
        </draw:frame>
        <draw:frame draw:style-name="gr2" draw:text-style-name="P2" draw:layer="layout" svg:width="2.047cm" svg:height="0.569cm" svg:x="8.793cm" svg:y="1.172cm">
          <draw:text-box>
            <text:p><text:span text:style-name="T1">Show object</text:span></text:p>
          </draw:text-box>
        </draw:frame>
        <draw:frame draw:style-name="gr2" draw:text-style-name="P2" draw:layer="layout" svg:width="2.644cm" svg:height="0.887cm" svg:x="7.105cm" svg:y="3.611cm">
          <draw:text-box>
            <text:p><text:span text:style-name="T1">Open connection</text:span></text:p>
            <text:p><text:span text:style-name="T1">to a CBserver</text:span></text:p>
          </draw:text-box>
        </draw:frame>
        <draw:frame draw:style-name="gr2" draw:text-style-name="P2" draw:layer="layout" svg:width="2.551cm" svg:height="0.887cm" svg:x="9.912cm" svg:y="3.682cm">
          <draw:text-box>
            <text:p><text:span text:style-name="T1">Show links</text:span></text:p>
            <text:p><text:span text:style-name="T1">between objects</text:span></text:p>
          </draw:text-box>
        </draw:frame>
        <draw:frame draw:style-name="gr2" draw:text-style-name="P2" draw:layer="layout" svg:width="3.533cm" svg:height="0.569cm" svg:x="14.63cm" svg:y="1.086cm">
          <draw:text-box>
            <text:p><text:span text:style-name="T1">Create objects and links</text:span></text:p>
          </draw:text-box>
        </draw:frame>
        <draw:frame draw:style-name="gr2" draw:text-style-name="P2" draw:layer="layout" svg:width="2.585cm" svg:height="0.887cm" svg:x="18.053cm" svg:y="3.786cm">
          <draw:text-box>
            <text:p><text:span text:style-name="T1">Show added /</text:span></text:p>
            <text:p><text:span text:style-name="T1">removed objects</text:span></text:p>
          </draw:text-box>
        </draw:frame>
        <draw:frame draw:style-name="gr2" draw:text-style-name="P2" draw:layer="layout" svg:width="2.631cm" svg:height="0.887cm" svg:x="19.172cm" svg:y="1.087cm">
          <draw:text-box>
            <text:p><text:span text:style-name="T1">Commit changes</text:span></text:p>
            <text:p><text:span text:style-name="T1">to CBserver</text:span></text:p>
          </draw:text-box>
        </draw:frame>
        <draw:line draw:style-name="gr3" draw:text-style-name="P3" draw:layer="layout" svg:x1="2.497cm" svg:y1="1.776cm" svg:x2="3.129cm" svg:y2="2.409cm">
          <text:p/>
        </draw:line>
        <draw:line draw:style-name="gr3" draw:text-style-name="P3" draw:layer="layout" svg:x1="4.494cm" svg:y1="3.174cm" svg:x2="4.227cm" svg:y2="3.856cm">
          <text:p/>
        </draw:line>
        <draw:line draw:style-name="gr3" draw:text-style-name="P3" draw:layer="layout" svg:x1="5.559cm" svg:y1="3.158cm" svg:x2="5.242cm" svg:y2="3.84cm">
          <text:p/>
        </draw:line>
        <draw:line draw:style-name="gr3" draw:text-style-name="P3" draw:layer="layout" svg:x1="6.806cm" svg:y1="1.444cm" svg:x2="7.189cm" svg:y2="2.326cm">
          <text:p/>
        </draw:line>
        <draw:line draw:style-name="gr3" draw:text-style-name="P3" draw:layer="layout" svg:x1="8.437cm" svg:y1="3.124cm" svg:x2="8.188cm" svg:y2="3.74cm">
          <text:p/>
        </draw:line>
        <draw:line draw:style-name="gr3" draw:text-style-name="P3" draw:layer="layout" svg:x1="9.935cm" svg:y1="1.577cm" svg:x2="10.068cm" svg:y2="2.309cm">
          <text:p/>
        </draw:line>
        <draw:line draw:style-name="gr3" draw:text-style-name="P3" draw:layer="layout" svg:x1="11.333cm" svg:y1="3.009cm" svg:x2="11.15cm" svg:y2="3.84cm">
          <text:p/>
        </draw:line>
        <draw:line draw:style-name="gr3" draw:text-style-name="P3" draw:layer="layout" svg:x1="17.474cm" svg:y1="1.56cm" svg:x2="17.939cm" svg:y2="2.226cm">
          <text:p/>
        </draw:line>
        <draw:line draw:style-name="gr3" draw:text-style-name="P3" draw:layer="layout" svg:x1="16.99cm" svg:y1="1.543cm" svg:x2="16.707cm" svg:y2="2.342cm">
          <text:p/>
        </draw:line>
        <draw:line draw:style-name="gr3" draw:text-style-name="P3" draw:layer="layout" svg:x1="16.158cm" svg:y1="1.56cm" svg:x2="15.692cm" svg:y2="2.342cm">
          <text:p/>
        </draw:line>
        <draw:line draw:style-name="gr3" draw:text-style-name="P3" draw:layer="layout" svg:x1="15.293cm" svg:y1="1.494cm" svg:x2="14.611cm" svg:y2="2.276cm">
          <text:p/>
        </draw:line>
        <draw:line draw:style-name="gr3" draw:text-style-name="P3" draw:layer="layout" svg:x1="19.389cm" svg:y1="3.041cm" svg:x2="19.403cm" svg:y2="3.84cm">
          <text:p/>
        </draw:line>
        <draw:line draw:style-name="gr3" draw:text-style-name="P3" draw:layer="layout" svg:x1="20.984cm" svg:y1="1.61cm" svg:x2="21.267cm" svg:y2="2.32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3.5cm" fo:page-height="5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nfred Jeusfeld</meta:initial-creator>
    <meta:creation-date>2026-05-02T16:41:15.219384597</meta:creation-date>
    <dc:date>2026-05-02T16:52:14.135711940</dc:date>
    <dc:creator>Manfred Jeusfeld</dc:creator>
    <meta:editing-duration>PT37S</meta:editing-duration>
    <meta:editing-cycles>1</meta:editing-cycles>
    <meta:document-statistic meta:object-count="23"/>
    <meta:generator>LibreOffice/7.3.7.2$Linux_X86_64 LibreOffice_project/30$Build-2</meta:generator>
  </office:meta>
</office:document-meta>
</file>