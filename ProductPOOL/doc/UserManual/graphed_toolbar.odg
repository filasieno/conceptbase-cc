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C000000281EAE697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4.446cm" svg:height="1.028cm" svg:x="2.589cm" svg:y="2.457cm">
            <draw:image xlink:href="Pictures/100002010000026C000000281EAE6979.png" xlink:type="simple" xlink:show="embed" xlink:actuate="onLoad">
              <text:p/>
            </draw:image>
          </draw:frame>
          <draw:line draw:style-name="gr2" draw:text-style-name="P1" draw:layer="layout" svg:x1="3.007cm" svg:y1="2.781cm" svg:x2="2.345cm" svg:y2="1.965cm">
            <text:p/>
          </draw:line>
          <draw:frame draw:style-name="gr3" draw:text-style-name="P2" draw:layer="layout" svg:width="3.364cm" svg:height="0.963cm" svg:x="1cm" svg:y="1.126cm">
            <draw:text-box>
              <text:p><text:span text:style-name="T1">Open new frame</text:span></text:p>
              <text:p><text:span text:style-name="T1">(without connection)</text:span></text:p>
            </draw:text-box>
          </draw:frame>
          <draw:frame draw:style-name="gr3" draw:text-style-name="P2" draw:layer="layout" svg:width="2.441cm" svg:height="0.963cm" svg:x="4.462cm" svg:y="1.105cm">
            <draw:text-box>
              <text:p><text:span text:style-name="T1">Hide selected</text:span></text:p>
              <text:p><text:span text:style-name="T1">objects</text:span></text:p>
            </draw:text-box>
          </draw:frame>
          <draw:frame draw:style-name="gr3" draw:text-style-name="P2" draw:layer="layout" svg:width="2.242cm" svg:height="0.607cm" svg:x="7.131cm" svg:y="1.328cm">
            <draw:text-box>
              <text:p><text:span text:style-name="T1">Show object</text:span></text:p>
            </draw:text-box>
          </draw:frame>
          <draw:frame draw:style-name="gr3" draw:text-style-name="P2" draw:layer="layout" svg:width="3.237cm" svg:height="0.607cm" svg:x="3.162cm" svg:y="3.932cm">
            <draw:text-box>
              <text:p><text:span text:style-name="T1">Load &amp; Save graph</text:span></text:p>
            </draw:text-box>
          </draw:frame>
          <draw:frame draw:style-name="gr3" draw:text-style-name="P2" draw:layer="layout" svg:width="2.051cm" svg:height="0.963cm" svg:x="6.536cm" svg:y="3.95cm">
            <draw:text-box>
              <text:p><text:span text:style-name="T1">Open</text:span></text:p>
              <text:p><text:span text:style-name="T1">connection</text:span></text:p>
            </draw:text-box>
          </draw:frame>
          <draw:frame draw:style-name="gr3" draw:text-style-name="P2" draw:layer="layout" svg:width="2.813cm" svg:height="0.963cm" svg:x="8.918cm" svg:y="3.95cm">
            <draw:text-box>
              <text:p><text:span text:style-name="T1">Show links</text:span></text:p>
              <text:p><text:span text:style-name="T1">between objects</text:span></text:p>
            </draw:text-box>
          </draw:frame>
          <draw:frame draw:style-name="gr3" draw:text-style-name="P2" draw:layer="layout" svg:width="2.564cm" svg:height="0.607cm" svg:x="11.849cm" svg:y="1.439cm">
            <draw:text-box>
              <text:p><text:span text:style-name="T1">Create objects</text:span></text:p>
            </draw:text-box>
          </draw:frame>
          <draw:frame draw:style-name="gr3" draw:text-style-name="P2" draw:layer="layout" svg:width="1.594cm" svg:height="0.607cm" svg:x="15.158cm" svg:y="1.418cm">
            <draw:text-box>
              <text:p><text:span text:style-name="T1">Commit</text:span></text:p>
            </draw:text-box>
          </draw:frame>
          <draw:frame draw:style-name="gr3" draw:text-style-name="P2" draw:layer="layout" svg:width="2.847cm" svg:height="0.963cm" svg:x="13.946cm" svg:y="3.885cm">
            <draw:text-box>
              <text:p><text:span text:style-name="T1">Show added/</text:span></text:p>
              <text:p><text:span text:style-name="T1">removed objects</text:span></text:p>
            </draw:text-box>
          </draw:frame>
          <draw:line draw:style-name="gr2" draw:text-style-name="P1" draw:layer="layout" svg:x1="15.398cm" svg:y1="3.288cm" svg:x2="14.935cm" svg:y2="4.037cm">
            <text:p/>
          </draw:line>
          <draw:line draw:style-name="gr2" draw:text-style-name="P1" draw:layer="layout" svg:x1="9.114cm" svg:y1="3.244cm" svg:x2="9.423cm" svg:y2="4.104cm">
            <text:p/>
          </draw:line>
          <draw:line draw:style-name="gr2" draw:text-style-name="P1" draw:layer="layout" svg:x1="7.02cm" svg:y1="3.31cm" svg:x2="7.042cm" svg:y2="4.126cm">
            <text:p/>
          </draw:line>
          <draw:line draw:style-name="gr2" draw:text-style-name="P1" draw:layer="layout" svg:x1="3.999cm" svg:y1="3.354cm" svg:x2="3.867cm" svg:y2="4.081cm">
            <text:p/>
          </draw:line>
          <draw:line draw:style-name="gr2" draw:text-style-name="P1" draw:layer="layout" svg:x1="4.727cm" svg:y1="3.398cm" svg:x2="4.661cm" svg:y2="4.126cm">
            <text:p/>
          </draw:line>
          <draw:line draw:style-name="gr2" draw:text-style-name="P1" draw:layer="layout" svg:x1="5.675cm" svg:y1="2.626cm" svg:x2="5.278cm" svg:y2="1.877cm">
            <text:p/>
          </draw:line>
          <draw:line draw:style-name="gr2" draw:text-style-name="P1" draw:layer="layout" svg:x1="8.232cm" svg:y1="2.626cm" svg:x2="8.232cm" svg:y2="1.877cm">
            <text:p/>
          </draw:line>
          <draw:line draw:style-name="gr2" draw:text-style-name="P1" draw:layer="layout" svg:x1="11.606cm" svg:y1="2.692cm" svg:x2="12.378cm" svg:y2="1.921cm">
            <text:p/>
          </draw:line>
          <draw:line draw:style-name="gr2" draw:text-style-name="P1" draw:layer="layout" svg:x1="12.488cm" svg:y1="2.648cm" svg:x2="12.752cm" svg:y2="1.965cm">
            <text:p/>
          </draw:line>
          <draw:line draw:style-name="gr2" draw:text-style-name="P1" draw:layer="layout" svg:x1="13.259cm" svg:y1="2.604cm" svg:x2="13.127cm" svg:y2="1.921cm">
            <text:p/>
          </draw:line>
          <draw:line draw:style-name="gr2" draw:text-style-name="P1" draw:layer="layout" svg:x1="14.075cm" svg:y1="2.604cm" svg:x2="13.524cm" svg:y2="1.987cm">
            <text:p/>
          </draw:line>
          <draw:line draw:style-name="gr2" draw:text-style-name="P1" draw:layer="layout" svg:x1="15.839cm" svg:y1="1.921cm" svg:x2="16.148cm" svg:y2="2.64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161cm" fo:page-height="5.8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nfred Jeusfeld</meta:initial-creator>
    <meta:creation-date>2009-04-27T15:50:48</meta:creation-date>
    <dc:date>2014-01-28T16:45:11.558558180</dc:date>
    <dc:creator>Manfred Jeusfeld</dc:creator>
    <meta:editing-duration>PT18M22S</meta:editing-duration>
    <meta:editing-cycles>3</meta:editing-cycles>
    <meta:generator>LibreOffice/4.1.3.2$Linux_X86_64 LibreOffice_project/410m0$Build-2</meta:generator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