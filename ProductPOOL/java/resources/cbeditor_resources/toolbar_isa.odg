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draw:stroke="solid" draw:stroke-dash="Fine_20_Dashed" svg:stroke-width="0.37cm" svg:stroke-color="#0000ff" draw:marker-start-width="1.67cm" draw:marker-end="" draw:marker-end-width="4.18cm" svg:stroke-linecap="butt" draw:fill="none" draw:textarea-vertical-align="middle" fo:padding-top="0.31cm" fo:padding-bottom="0.31cm" fo:padding-left="0.435cm" fo:padding-right="0.4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396cm"/>
      <style:paragraph-properties style:writing-mode="lr-tb"/>
    </style:style>
    <style:style style:name="gr4" style:family="graphic" style:parent-style-name="standard">
      <style:graphic-properties svg:stroke-width="0.37cm" svg:stroke-color="#0000ff" draw:marker-start-width="0.76cm" draw:marker-end-width="0.76cm" draw:fill-color="#ffffff" draw:textarea-horizontal-align="justify" draw:textarea-vertical-align="middle" draw:auto-grow-height="false" fo:min-height="0.4cm" fo:min-width="0.548cm" fo:padding-top="0.31cm" fo:padding-bottom="0.31cm" fo:padding-left="0.435cm" fo:padding-right="0.43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9cm" svg:y1="7.616cm" svg:x2="6.649cm" svg:y2="2.849cm">
          <text:p/>
        </draw:line>
        <draw:frame draw:style-name="gr3" draw:text-style-name="P3" draw:layer="layout" svg:width="4.896cm" svg:height="3.405cm" svg:x="4.104cm" svg:y="5.213cm">
          <draw:text-box>
            <text:p><text:span text:style-name="T1">isA</text:span></text:p>
          </draw:text-box>
        </draw:frame>
        <draw:custom-shape draw:style-name="gr4" draw:text-style-name="P4" draw:layer="layout" svg:width="2.094cm" svg:height="1.948cm" draw:transform="rotate (-0.722915376176052) translate (6.701cm 1.3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34:03.456585115</dc:date>
    <dc:creator>Manfred Jeusfeld</dc:creator>
    <meta:editing-duration>PT9M32S</meta:editing-duration>
    <meta:editing-cycles>3</meta:editing-cycles>
    <meta:generator>LibreOffice/7.3.7.2$Linux_X86_64 LibreOffice_project/30$Build-2</meta:generator>
    <meta:document-statistic meta:object-count="4"/>
  </office:meta>
</office:document-meta>
</file>