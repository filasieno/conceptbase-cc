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31cm" svg:stroke-color="#0000ff" draw:marker-start-width="0.67cm" draw:marker-end-width="0.67cm" draw:fill-color="#ffffff" draw:textarea-horizontal-align="justify" draw:textarea-vertical-align="middle" draw:auto-grow-height="false" fo:min-height="2.919cm" fo:min-width="6.16cm" fo:padding-top="0.28cm" fo:padding-bottom="0.28cm" fo:padding-left="0.405cm" fo:padding-right="0.405cm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57cm" fo:min-width="1.155cm"/>
    </style:style>
    <style:style style:name="gr3" style:family="graphic" style:parent-style-name="objectwithoutfill">
      <style:graphic-properties svg:stroke-width="0.5cm" svg:stroke-color="#ff3333" draw:marker-start-width="0.96cm" draw:marker-end="Rounded_20_short_20_Arrow" draw:marker-end-width="1.76cm" draw:fill="none" draw:textarea-vertical-align="middle" fo:padding-top="0.375cm" fo:padding-bottom="0.375cm" fo:padding-left="0.5cm" fo:padding-right="0.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cm" svg:height="3.479cm" svg:x="1.408cm" svg:y="5.224cm">
          <text:p text:style-name="P1"><text:span text:style-name="T1">C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5cm" svg:height="0.507cm" svg:x="4.031cm" svg:y="5.06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754cm" svg:y1="1.583cm" svg:x2="4.833cm" svg:y2="4.9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30T21:33:34.868434301</dc:date>
    <dc:creator>Manfred Jeusfeld</dc:creator>
    <meta:editing-duration>PT49M44S</meta:editing-duration>
    <meta:editing-cycles>29</meta:editing-cycles>
    <meta:generator>LibreOffice/7.3.7.2$Linux_X86_64 LibreOffice_project/30$Build-2</meta:generator>
    <meta:document-statistic meta:object-count="3"/>
  </office:meta>
</office:document-meta>
</file>