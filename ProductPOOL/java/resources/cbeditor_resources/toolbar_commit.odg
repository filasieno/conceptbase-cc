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31cm" svg:stroke-color="#0000ff" draw:marker-start-width="0.67cm" draw:marker-end-width="0.67cm" draw:fill-color="#ffffff" draw:textarea-horizontal-align="justify" draw:textarea-vertical-align="middle" draw:auto-grow-height="false" fo:min-height="3.257cm" fo:min-width="6.035cm" fo:padding-top="0.28cm" fo:padding-bottom="0.28cm" fo:padding-left="0.405cm" fo:padding-right="0.405cm"/>
      <style:paragraph-properties style:writing-mode="lr-tb"/>
    </style:style>
    <style:style style:name="gr2" style:family="graphic" style:parent-style-name="objectwithoutfill">
      <style:graphic-properties svg:stroke-width="0.5cm" svg:stroke-color="#ffffff" draw:marker-start-width="0.96cm" draw:marker-end="Rounded_20_short_20_Arrow" draw:marker-end-width="1.96cm" draw:fill="none" draw:textarea-vertical-align="middle" fo:padding-top="0.375cm" fo:padding-bottom="0.375cm" fo:padding-left="0.5cm" fo:padding-right="0.5cm"/>
    </style:style>
    <style:style style:name="gr3" style:family="graphic" style:parent-style-name="objectwithoutfill">
      <style:graphic-properties svg:stroke-width="0.5cm" svg:stroke-color="#cc0000" draw:marker-start-width="0.96cm" draw:marker-end="Rounded_20_short_20_Arrow" draw:marker-end-width="1.96cm" draw:fill="none" draw:textarea-vertical-align="middle" fo:padding-top="0.375cm" fo:padding-bottom="0.375cm" fo:padding-left="0.5cm" fo:padding-right="0.5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0pt" style:font-size-asian="80pt" style:font-size-complex="80pt"/>
    </style:style>
    <style:style style:name="P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80pt" style:font-size-asian="80pt" style:font-size-complex="8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70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45cm" svg:height="3.817cm" svg:x="1.599cm" svg:y="4.897cm">
          <text:p text:style-name="P1"><text:span text:style-name="T1">CB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509cm" svg:y1="1cm" svg:x2="5.157cm" svg:y2="4.199cm">
          <text:p/>
        </draw:line>
        <draw:line draw:style-name="gr3" draw:text-style-name="P3" draw:layer="layout" svg:x1="1.205cm" svg:y1="1.216cm" svg:x2="4.853cm" svg:y2="4.41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nfred Jeusfeld</meta:initial-creator>
    <meta:creation-date>2026-04-25T17:38:40.743181420</meta:creation-date>
    <dc:date>2026-04-26T14:21:51.805292762</dc:date>
    <dc:creator>Manfred Jeusfeld</dc:creator>
    <meta:editing-duration>PT41M12S</meta:editing-duration>
    <meta:editing-cycles>19</meta:editing-cycles>
    <meta:generator>LibreOffice/7.3.7.2$Linux_X86_64 LibreOffice_project/30$Build-2</meta:generator>
    <meta:document-statistic meta:object-count="3"/>
  </office:meta>
</office:document-meta>
</file>