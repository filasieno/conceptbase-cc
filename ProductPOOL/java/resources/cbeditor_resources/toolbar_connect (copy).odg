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7.75cm" fo:min-width="7.5cm"/>
    </style:style>
    <style:style style:name="gr2" style:family="graphic" style:parent-style-name="standard" style:list-style-name="L1">
      <style:graphic-properties draw:stroke="solid" svg:stroke-width="0.31cm" svg:stroke-color="#0000ff" draw:marker-start-width="0.67cm" draw:marker-end-width="0.67cm" draw:fill-color="#ffffff" draw:textarea-horizontal-align="justify" draw:textarea-vertical-align="middle" draw:auto-grow-height="false" fo:min-height="2.919cm" fo:min-width="6.566cm" fo:padding-top="0.28cm" fo:padding-bottom="0.28cm" fo:padding-left="0.405cm" fo:padding-right="0.405cm"/>
      <style:paragraph-properties style:writing-mode="lr-tb"/>
    </style:style>
    <style:style style:name="gr3" style:family="graphic" style:parent-style-name="standard" style:list-style-name="L1">
      <style:graphic-properties draw:stroke="solid" svg:stroke-width="0.31cm" svg:stroke-color="#009900" draw:marker-start-width="0.67cm" draw:marker-end-width="0.67cm" draw:fill-color="#ffffff" draw:textarea-horizontal-align="justify" draw:textarea-vertical-align="middle" draw:auto-grow-height="false" fo:min-height="1.782cm" fo:min-width="6.518cm" fo:padding-top="0.28cm" fo:padding-bottom="0.28cm" fo:padding-left="0.405cm" fo:padding-right="0.405cm"/>
      <style:paragraph-properties style:writing-mode="lr-tb"/>
    </style:style>
    <style:style style:name="gr4" style:family="graphic" style:parent-style-name="objectwithoutfill">
      <style:graphic-properties svg:stroke-width="0.41cm" svg:stroke-color="#ff3333" draw:marker-start-width="0.82cm" draw:marker-end-width="0.82cm" draw:fill="none" draw:textarea-vertical-align="middle" fo:padding-top="0.33cm" fo:padding-bottom="0.33cm" fo:padding-left="0.455cm" fo:padding-right="0.4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36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2pt" style:font-size-asian="42pt" style:font-size-complex="42pt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2pt" style:font-size-asian="42pt" style:font-size-complex="4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3333" loext:opacity="100%" fo:font-size="80pt" style:font-size-asian="80pt" style:font-size-complex="80pt"/>
    </style:style>
    <style:style style:name="P8" style:family="paragraph">
      <loext:graphic-properties draw:fill="none" draw:fill-color="#ffffff"/>
      <style:paragraph-properties style:writing-mode="lr-tb"/>
      <style:text-properties fo:color="#ff333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76cm" svg:height="3.479cm" svg:x="1.295cm" svg:y="5.212cm">
          <text:p text:style-name="P2"><text:span text:style-name="T1">cb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328cm" svg:height="2.342cm" svg:x="1.33cm" svg:y="1.193cm">
          <text:p text:style-name="P4"><text:span text:style-name="T2">cbgraph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954cm" svg:y1="3.682cm" svg:x2="4.943cm" svg:y2="5.067cm">
          <text:p/>
        </draw:line>
        <draw:frame draw:style-name="gr5" draw:text-style-name="P8" draw:layer="layout" svg:width="2.153cm" svg:height="3.405cm" svg:x="6.991cm" svg:y="3.455cm">
          <draw:text-box>
            <text:p text:style-name="P7"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Jeusfeld</meta:initial-creator>
    <meta:creation-date>2026-04-25T17:38:40.743181420</meta:creation-date>
    <dc:date>2026-04-30T21:42:52.763737961</dc:date>
    <dc:creator>Manfred Jeusfeld</dc:creator>
    <meta:editing-duration>PT55M25S</meta:editing-duration>
    <meta:editing-cycles>30</meta:editing-cycles>
    <meta:generator>LibreOffice/7.3.7.2$Linux_X86_64 LibreOffice_project/30$Build-2</meta:generator>
    <meta:document-statistic meta:object-count="5"/>
  </office:meta>
</office:document-meta>
</file>