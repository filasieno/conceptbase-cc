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standard" style:list-style-name="L1">
      <style:graphic-properties draw:stroke="solid" svg:stroke-width="0.212cm" svg:stroke-color="#000000" draw:marker-start-width="0.518cm" draw:marker-end-width="0.518cm" draw:fill-color="#ffffff" draw:textarea-horizontal-align="justify" draw:textarea-vertical-align="middle" draw:auto-grow-height="false" fo:min-height="3.196cm" fo:min-width="6.199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4" style:family="paragraph">
      <style:text-properties fo:color="#cc000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cc0000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cc0000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11cm" svg:height="3.658cm" svg:x="1.499cm" svg:y="3.66cm">
          <text:p text:style-name="P2"><text:span text:style-name="T1">Obj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861cm" svg:height="2.855cm" svg:x="1.114cm" svg:y="1cm">
          <draw:text-box>
            <text:p text:style-name="P4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30T15:11:51.116396383</dc:date>
    <dc:creator>Manfred Jeusfeld</dc:creator>
    <meta:editing-duration>PT12M28S</meta:editing-duration>
    <meta:editing-cycles>6</meta:editing-cycles>
    <meta:generator>LibreOffice/7.3.7.2$Linux_X86_64 LibreOffice_project/30$Build-2</meta:generator>
    <meta:document-statistic meta:object-count="3"/>
  </office:meta>
</office:document-meta>
</file>