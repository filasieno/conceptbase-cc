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draw:stroke="dash" draw:stroke-dash="Fine_20_Dashed" svg:stroke-width="0.62cm" svg:stroke-color="#009900" draw:marker-start-width="2.04cm" draw:marker-end="" draw:marker-end-width="4.55cm" svg:stroke-linecap="butt" draw:fill="none" draw:textarea-vertical-align="middle" fo:padding-top="0.435cm" fo:padding-bottom="0.435cm" fo:padding-left="0.56cm" fo:padding-right="0.56cm"/>
    </style:style>
    <style:style style:name="gr3" style:family="graphic" style:parent-style-name="objectwithoutfill">
      <style:graphic-properties svg:stroke-width="0.51cm" svg:stroke-color="#009900" draw:marker-start-width="0.97cm" draw:marker-end="" draw:marker-end-width="1.07cm" draw:fill="none" draw:textarea-vertical-align="middle" fo:padding-top="0.38cm" fo:padding-bottom="0.38cm" fo:padding-left="0.505cm" fo:padding-right="0.5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2.5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0pt" fo:font-weight="bold" style:font-size-asian="66pt" style:font-weight-asian="bold" style:font-size-complex="66pt" style:font-weight-complex="bold"/>
    </style:style>
    <style:style style:name="P4" style:family="paragraph">
      <style:text-properties fo:color="#cc000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c0000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80pt" fo:font-weight="bold" style:font-size-asian="66pt" style:font-weight-asian="bold" style:font-size-complex="66pt" style:font-weight-complex="bold"/>
    </style:style>
    <style:style style:name="T2" style:family="text">
      <style:text-properties fo:color="#cc0000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79cm" svg:y1="7.717cm" svg:x2="6.638cm" svg:y2="2.95cm">
          <text:p/>
        </draw:line>
        <draw:line draw:style-name="gr3" draw:text-style-name="P2" draw:layer="layout" svg:x1="4.554cm" svg:y1="2.95cm" svg:x2="7.34cm" svg:y2="2.236cm">
          <text:p/>
        </draw:line>
        <draw:line draw:style-name="gr3" draw:text-style-name="P2" draw:layer="layout" svg:x1="6.767cm" svg:y1="5.011cm" svg:x2="7.422cm" svg:y2="2.049cm">
          <text:p/>
        </draw:line>
        <draw:frame draw:style-name="gr4" draw:text-style-name="P3" draw:layer="layout" svg:width="3.008cm" svg:height="3.405cm" svg:x="4.776cm" svg:y="5.337cm">
          <draw:text-box>
            <text:p><text:span text:style-name="T1">in</text:span></text:p>
          </draw:text-box>
        </draw:frame>
        <draw:frame draw:style-name="gr5" draw:text-style-name="P5" draw:layer="layout" svg:width="1.861cm" svg:height="2.855cm" svg:x="1.115cm" svg:y="1.001cm">
          <draw:text-box>
            <text:p text:style-name="P4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30T15:11:22.702717183</dc:date>
    <dc:creator>Manfred Jeusfeld</dc:creator>
    <meta:editing-duration>PT7M23S</meta:editing-duration>
    <meta:editing-cycles>3</meta:editing-cycles>
    <meta:generator>LibreOffice/7.3.7.2$Linux_X86_64 LibreOffice_project/30$Build-2</meta:generator>
    <meta:document-statistic meta:object-count="6"/>
  </office:meta>
</office:document-meta>
</file>