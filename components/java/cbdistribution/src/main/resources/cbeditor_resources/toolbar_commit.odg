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5cm" svg:stroke-color="#ff3333" draw:marker-start-width="0.96cm" draw:marker-end="Rounded_20_short_20_Arrow" draw:marker-end-width="1.76cm" draw:fill="none" draw:textarea-vertical-align="middle" fo:padding-top="0.375cm" fo:padding-bottom="0.375cm" fo:padding-left="0.5cm" fo:padding-right="0.5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666666" draw:textarea-horizontal-align="justify" draw:textarea-vertical-align="middle" draw:auto-grow-height="false" fo:min-height="2.324cm" fo:min-width="7.129cm" fo:padding-top="0.178cm" fo:padding-bottom="0.178cm" fo:padding-left="0.303cm" fo:padding-right="0.3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loext:graphic-properties draw:fill-color="#666666"/>
      <style:paragraph-properties fo:text-align="center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33cm" svg:y1="2.349cm" svg:x2="4.912cm" svg:y2="5.764cm">
          <text:p/>
        </draw:line>
        <draw:custom-shape draw:style-name="gr2" draw:text-style-name="P3" draw:layer="layout" svg:width="7.735cm" svg:height="2.68cm" svg:x="1.159cm" svg:y="6.057cm">
          <text:p text:style-name="P2"><text:span text:style-name="T1">cbserv</text:span><text:span text:style-name="T1">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5-02T14:24:46.829738304</dc:date>
    <dc:creator>Manfred Jeusfeld</dc:creator>
    <meta:editing-duration>PT57M56S</meta:editing-duration>
    <meta:editing-cycles>33</meta:editing-cycles>
    <meta:generator>LibreOffice/7.3.7.2$Linux_X86_64 LibreOffice_project/30$Build-2</meta:generator>
    <meta:document-statistic meta:object-count="2"/>
  </office:meta>
</office:document-meta>
</file>