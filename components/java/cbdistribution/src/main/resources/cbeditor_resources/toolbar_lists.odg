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 style:list-style-name="L1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5.201cm" fo:min-width="6.629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59cm" svg:stroke-color="#000000" draw:marker-start-width="0.443cm" draw:marker-end-width="0.443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41cm" svg:height="5.663cm" svg:x="1.259cm" svg:y="2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24cm" svg:height="0.543cm" draw:transform="rotate (-1.55927715373173) translate (2.255cm 3.7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2.634cm" svg:y1="4.156cm" svg:x2="4.214cm" svg:y2="4.155cm">
          <text:p/>
        </draw:line>
        <draw:line draw:style-name="gr4" draw:text-style-name="P4" draw:layer="layout" svg:x1="2.656cm" svg:y1="5.034cm" svg:x2="4.228cm" svg:y2="5.034cm">
          <text:p/>
        </draw:line>
        <draw:line draw:style-name="gr4" draw:text-style-name="P4" draw:layer="layout" svg:x1="2.66cm" svg:y1="5.844cm" svg:x2="4.24cm" svg:y2="5.843cm">
          <text:p/>
        </draw:line>
        <draw:line draw:style-name="gr4" draw:text-style-name="P4" draw:layer="layout" svg:x1="2.674cm" svg:y1="6.689cm" svg:x2="4.254cm" svg:y2="6.688cm">
          <text:p/>
        </draw:line>
        <draw:custom-shape draw:style-name="gr3" draw:text-style-name="P3" draw:layer="layout" svg:width="0.724cm" svg:height="0.543cm" draw:transform="rotate (-1.55927715373173) translate (5.842cm 3.7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6.193cm" svg:y1="4.135cm" svg:x2="7.773cm" svg:y2="4.134cm">
          <text:p/>
        </draw:line>
        <draw:line draw:style-name="gr4" draw:text-style-name="P4" draw:layer="layout" svg:x1="6.215cm" svg:y1="5.013cm" svg:x2="7.787cm" svg:y2="5.013cm">
          <text:p/>
        </draw:line>
        <draw:line draw:style-name="gr4" draw:text-style-name="P4" draw:layer="layout" svg:x1="6.22cm" svg:y1="5.835cm" svg:x2="7.8cm" svg:y2="5.834cm">
          <text:p/>
        </draw:line>
        <draw:line draw:style-name="gr4" draw:text-style-name="P4" draw:layer="layout" svg:x1="6.234cm" svg:y1="6.68cm" svg:x2="7.814cm" svg:y2="6.679cm">
          <text:p/>
        </draw:line>
        <draw:frame draw:style-name="gr5" draw:text-style-name="P5" draw:layer="layout" svg:width="1.971cm" svg:height="2.618cm" svg:x="1.319cm" svg:y="1.488cm">
          <draw:text-box>
            <text:p><text:span text:style-name="T1">+</text:span></text:p>
          </draw:text-box>
        </draw:frame>
        <draw:frame draw:style-name="gr5" draw:text-style-name="P5" draw:layer="layout" svg:width="1.971cm" svg:height="2.618cm" svg:x="5.193cm" svg:y="1.33cm">
          <draw:text-box>
            <text:p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31:38.850054242</dc:date>
    <dc:creator>Manfred Jeusfeld</dc:creator>
    <meta:editing-duration>PT24M48S</meta:editing-duration>
    <meta:editing-cycles>12</meta:editing-cycles>
    <meta:generator>LibreOffice/7.3.7.2$Linux_X86_64 LibreOffice_project/30$Build-2</meta:generator>
    <meta:document-statistic meta:object-count="14"/>
  </office:meta>
</office:document-meta>
</file>