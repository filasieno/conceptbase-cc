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objectwithoutfill">
      <style:graphic-properties svg:stroke-width="0.18cm" svg:stroke-color="#000000" draw:marker-start-width="0.48cm" draw:marker-end-width="0.48cm" draw:fill="none" draw:textarea-vertical-align="middle" fo:padding-top="0.215cm" fo:padding-bottom="0.215cm" fo:padding-left="0.34cm" fo:padding-right="0.34cm"/>
    </style:style>
    <style:style style:name="gr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3333" draw:textarea-horizontal-align="justify" draw:textarea-vertical-align="middle" draw:auto-grow-height="false" fo:min-height="0.724cm" fo:min-width="1.87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724cm" fo:min-width="1.939cm" fo:padding-top="0.178cm" fo:padding-bottom="0.178cm" fo:padding-left="0.303cm" fo:padding-right="0.303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00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5cm" svg:y1="2.173cm" svg:x2="2.432cm" svg:y2="4.379cm">
          <text:p/>
        </draw:line>
        <draw:line draw:style-name="gr3" draw:text-style-name="P2" draw:layer="layout" svg:x1="5.675cm" svg:y1="3.592cm" svg:x2="6.215cm" svg:y2="4.099cm">
          <text:p/>
        </draw:line>
        <draw:line draw:style-name="gr4" draw:text-style-name="P2" draw:layer="layout" svg:x1="7.611cm" svg:y1="5.485cm" svg:x2="8.151cm" svg:y2="5.992cm">
          <text:p/>
        </draw:line>
        <draw:line draw:style-name="gr3" draw:text-style-name="P2" draw:layer="layout" svg:x1="7.938cm" svg:y1="3.604cm" svg:x2="7.408cm" svg:y2="4.089cm">
          <text:p/>
        </draw:line>
        <draw:line draw:style-name="gr4" draw:text-style-name="P2" draw:layer="layout" svg:x1="6.305cm" svg:y1="5.463cm" svg:x2="5.775cm" svg:y2="5.948cm">
          <text:p/>
        </draw:line>
        <draw:line draw:style-name="gr3" draw:text-style-name="P2" draw:layer="layout" svg:x1="6.778cm" svg:y1="3.423cm" svg:x2="6.8cm" svg:y2="4.055cm">
          <text:p/>
        </draw:line>
        <draw:line draw:style-name="gr4" draw:text-style-name="P2" draw:layer="layout" svg:x1="6.88cm" svg:y1="5.45cm" svg:x2="6.902cm" svg:y2="6.082cm">
          <text:p/>
        </draw:line>
        <draw:custom-shape draw:style-name="gr5" draw:text-style-name="P3" draw:layer="layout" svg:width="2.478cm" svg:height="1.08cm" svg:x="5.584cm" svg:y="4.2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71cm" svg:y1="7.69cm" svg:x2="2.421cm" svg:y2="5.292cm">
          <text:p/>
        </draw:line>
        <draw:custom-shape draw:style-name="gr6" draw:text-style-name="P4" draw:layer="layout" svg:width="2.545cm" svg:height="1.08cm" svg:x="1.261cm" svg:y="4.2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5cm" svg:height="1.08cm" svg:x="2.567cm" svg:y="7.5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5cm" svg:height="1.08cm" svg:x="2.725cm" svg:y="1.2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26T12:20:16.851550712</dc:date>
    <dc:creator>Manfred Jeusfeld</dc:creator>
    <meta:editing-duration>PT19M7S</meta:editing-duration>
    <meta:editing-cycles>6</meta:editing-cycles>
    <meta:generator>LibreOffice/7.3.7.2$Linux_X86_64 LibreOffice_project/30$Build-2</meta:generator>
    <meta:document-statistic meta:object-count="13"/>
  </office:meta>
</office:document-meta>
</file>