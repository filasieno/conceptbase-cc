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05cm" svg:stroke-color="#0000cc" draw:marker-start-width="0.863cm" draw:marker-end-width="0.863cm" draw:stroke-linejoin="round" draw:fill="solid" draw:fill-color="#ffffed" fo:padding-top="0.262cm" fo:padding-bottom="0.262cm" fo:padding-left="0.387cm" fo:padding-right="0.387cm"/>
    </style:style>
    <style:style style:name="gr2" style:family="graphic" style:parent-style-name="standard">
      <style:graphic-properties draw:stroke="none" svg:stroke-width="0.051cm" draw:marker-start-width="0.355cm" draw:marker-end-width="0.355cm" draw:fill="solid" draw:fill-color="#ff3300" draw:textarea-horizontal-align="justify" draw:textarea-vertical-align="middle" draw:auto-grow-height="false" fo:padding-top="0.15cm" fo:padding-bottom="0.15cm" fo:padding-left="0.275cm" fo:padding-right="0.275cm" draw:shadow="hidden" draw:shadow-offset-x="0.051cm" draw:shadow-offset-y="0.051cm"/>
    </style:style>
    <style:style style:name="gr3" style:family="graphic" style:parent-style-name="objectwithoutfill">
      <style:graphic-properties svg:stroke-width="0.203cm" svg:stroke-color="#333333" draw:marker-start-width="0.503cm" draw:marker-end-width="0.503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305cm" svg:stroke-color="#0000cc" draw:marker-start-width="1.041cm" draw:marker-end-width="1.041cm" draw:fill="none" draw:textarea-vertical-align="middle" fo:padding-top="0.277cm" fo:padding-bottom="0.277cm" fo:padding-left="0.402cm" fo:padding-right="0.402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polygon draw:style-name="gr1" draw:layer="layout" svg:width="3.682cm" svg:height="3.52cm" svg:x="1.427cm" svg:y="1.09cm" svg:viewBox="0 0 3683 3521" draw:points="1843,3521 0,3521 0,0 3683,0 3683,3521">
            <text:p/>
          </draw:polygon>
          <draw:custom-shape draw:style-name="gr2" draw:text-style-name="P1" draw:layer="layout" svg:width="1.175cm" svg:height="1.002cm" svg:x="3.264cm" svg:y="2.1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" draw:text-style-name="P1" draw:layer="layout" svg:x1="1.811cm" svg:y1="1.611cm" svg:x2="3.046cm" svg:y2="1.597cm">
              <text:p/>
            </draw:line>
            <draw:line draw:style-name="gr3" draw:text-style-name="P1" draw:layer="layout" svg:x1="1.811cm" svg:y1="1.978cm" svg:x2="3.046cm" svg:y2="1.964cm">
              <text:p/>
            </draw:line>
            <draw:line draw:style-name="gr3" draw:text-style-name="P1" draw:layer="layout" svg:x1="1.811cm" svg:y1="2.359cm" svg:x2="3.046cm" svg:y2="2.345cm">
              <text:p/>
            </draw:line>
          </draw:g>
          <draw:custom-shape draw:style-name="gr4" draw:text-style-name="P1" draw:layer="layout" svg:width="0.475cm" svg:height="0.312cm" svg:x="3.347cm" svg:y="4.4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3.866cm" svg:y1="4.759cm" svg:x2="3.837cm" svg:y2="3.363cm">
            <text:p/>
          </draw:line>
          <draw:g>
            <draw:line draw:style-name="gr3" draw:text-style-name="P1" draw:layer="layout" svg:x1="1.811cm" svg:y1="3.151cm" svg:x2="3.046cm" svg:y2="3.137cm">
              <text:p/>
            </draw:line>
            <draw:line draw:style-name="gr3" draw:text-style-name="P1" draw:layer="layout" svg:x1="1.811cm" svg:y1="3.518cm" svg:x2="3.046cm" svg:y2="3.504cm">
              <text:p/>
            </draw:line>
            <draw:line draw:style-name="gr3" draw:text-style-name="P1" draw:layer="layout" svg:x1="1.811cm" svg:y1="3.899cm" svg:x2="3.046cm" svg:y2="3.885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06cm" fo:margin-bottom="0.66cm" fo:margin-left="0.406cm" fo:margin-right="0.406cm" fo:page-width="6.35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8T12:36:16.340473720</meta:creation-date>
    <dc:date>2014-09-02T12:58:09.064982576</dc:date>
    <meta:editing-duration>PT6M38S</meta:editing-duration>
    <meta:editing-cycles>8</meta:editing-cycles>
    <meta:generator>LibreOffice/4.2.4.2$Linux_X86_64 LibreOffice_project/420m0$Build-2</meta:generator>
    <meta:document-statistic meta:object-count="13"/>
  </office:meta>
</office:document-meta>
</file>